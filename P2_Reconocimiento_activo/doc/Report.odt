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4D3000002001916CE66.png" manifest:media-type="image/png"/>
  <manifest:file-entry manifest:full-path="Pictures/10000001000002E7000000BB468F7CE9.png" manifest:media-type="image/png"/>
  <manifest:file-entry manifest:full-path="Pictures/1000000000000200000002006D79B285.jpg" manifest:media-type="image/jpeg"/>
  <manifest:file-entry manifest:full-path="Pictures/10000000000004BB00000357C1A79A8C.png" manifest:media-type="image/png"/>
  <manifest:file-entry manifest:full-path="Pictures/1000000000000320000001F436E325CA.png" manifest:media-type="image/png"/>
  <manifest:file-entry manifest:full-path="Pictures/10000000000003FA00000286A0F43F97.png" manifest:media-type="image/png"/>
  <manifest:file-entry manifest:full-path="Pictures/100000000000038E000003CCC0C16BA2.png" manifest:media-type="image/png"/>
  <manifest:file-entry manifest:full-path="Pictures/10000001000001660000030F33DC2017.png" manifest:media-type="image/png"/>
  <manifest:file-entry manifest:full-path="Pictures/10000000000002FE00000402EDC4C195.png" manifest:media-type="image/png"/>
  <manifest:file-entry manifest:full-path="Pictures/10000001000003220000024F2E1AC767.png" manifest:media-type="image/png"/>
  <manifest:file-entry manifest:full-path="Pictures/100000010000026200000093C0558763.png" manifest:media-type="image/png"/>
  <manifest:file-entry manifest:full-path="Pictures/100000010000016800000081ED287C3B.png" manifest:media-type="image/png"/>
  <manifest:file-entry manifest:full-path="Pictures/1000000100000503000000D857D49AA7.png" manifest:media-type="image/png"/>
  <manifest:file-entry manifest:full-path="Pictures/10000000000004280000007F61BD37C6.png" manifest:media-type="image/png"/>
  <manifest:file-entry manifest:full-path="Pictures/1000000000000240000003859FD9B43E.png" manifest:media-type="image/png"/>
  <manifest:file-entry manifest:full-path="Pictures/10000001000004350000008EFB496693.png" manifest:media-type="image/png"/>
  <manifest:file-entry manifest:full-path="Pictures/1000000000000517000000BE08D419AF.png" manifest:media-type="image/png"/>
  <manifest:file-entry manifest:full-path="Pictures/1000000100000607000000FF7561B7B1.png" manifest:media-type="image/png"/>
  <manifest:file-entry manifest:full-path="Pictures/1000000000000177000002F3C417DFF8.png" manifest:media-type="image/png"/>
  <manifest:file-entry manifest:full-path="Pictures/1000000100000763000002E7DDE50CF2.png" manifest:media-type="image/png"/>
  <manifest:file-entry manifest:full-path="Pictures/10000001000002BC0000010ADB179DF1.png" manifest:media-type="image/png"/>
  <manifest:file-entry manifest:full-path="Pictures/10000000000003100000015123A9983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roman"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a7" style:family="table">
      <style:table-properties style:width="17cm" table:align="left"/>
    </style:style>
    <style:style style:name="Tabla7.A" style:family="table-column">
      <style:table-column-properties style:column-width="2.106cm"/>
    </style:style>
    <style:style style:name="Tabla7.B" style:family="table-column">
      <style:table-column-properties style:column-width="2.053cm"/>
    </style:style>
    <style:style style:name="Tabla7.C" style:family="table-column">
      <style:table-column-properties style:column-width="2.337cm"/>
    </style:style>
    <style:style style:name="Tabla7.D" style:family="table-column">
      <style:table-column-properties style:column-width="3.641cm"/>
    </style:style>
    <style:style style:name="Tabla7.E" style:family="table-column">
      <style:table-column-properties style:column-width="2.51cm"/>
    </style:style>
    <style:style style:name="Tabla7.F" style:family="table-column">
      <style:table-column-properties style:column-width="4.353cm"/>
    </style:style>
    <style:style style:name="Tabla7.A1" style:family="table-cell">
      <style:table-cell-properties style:vertical-align="middle" fo:padding="0.049cm" fo:border="none"/>
    </style:style>
    <style:style style:name="Tabla8" style:family="table">
      <style:table-properties style:width="17cm" table:align="left"/>
    </style:style>
    <style:style style:name="Tabla8.A" style:family="table-column">
      <style:table-column-properties style:column-width="2.133cm"/>
    </style:style>
    <style:style style:name="Tabla8.B" style:family="table-column">
      <style:table-column-properties style:column-width="3.406cm"/>
    </style:style>
    <style:style style:name="Tabla8.C" style:family="table-column">
      <style:table-column-properties style:column-width="3.948cm"/>
    </style:style>
    <style:style style:name="Tabla8.D" style:family="table-column">
      <style:table-column-properties style:column-width="1.998cm"/>
    </style:style>
    <style:style style:name="Tabla8.E" style:family="table-column">
      <style:table-column-properties style:column-width="5.516cm"/>
    </style:style>
    <style:style style:name="Tabla8.A1" style:family="table-cell">
      <style:table-cell-properties style:vertical-align="middle" fo:padding="0.049cm" fo:border="none"/>
    </style:style>
    <style:style style:name="Tabla9" style:family="table">
      <style:table-properties style:width="6.482cm" table:align="left"/>
    </style:style>
    <style:style style:name="Tabla9.A" style:family="table-column">
      <style:table-column-properties style:column-width="2.905cm"/>
    </style:style>
    <style:style style:name="Tabla9.B" style:family="table-column">
      <style:table-column-properties style:column-width="3.577cm"/>
    </style:style>
    <style:style style:name="Tabla9.A1" style:family="table-cell">
      <style:table-cell-properties style:vertical-align="middle" fo:padding="0.049cm" fo:border="none"/>
    </style:style>
    <style:style style:name="Tabla1" style:family="table">
      <style:table-properties style:width="17cm" table:align="left"/>
    </style:style>
    <style:style style:name="Tabla1.A" style:family="table-column">
      <style:table-column-properties style:column-width="3.373cm"/>
    </style:style>
    <style:style style:name="Tabla1.B" style:family="table-column">
      <style:table-column-properties style:column-width="5.87cm"/>
    </style:style>
    <style:style style:name="Tabla1.C" style:family="table-column">
      <style:table-column-properties style:column-width="7.758cm"/>
    </style:style>
    <style:style style:name="Tabla1.A1" style:family="table-cell">
      <style:table-cell-properties style:vertical-align="middle" fo:padding="0.049cm" fo:border="none"/>
    </style:style>
    <style:style style:name="Tabla2" style:family="table">
      <style:table-properties style:width="15.482cm" table:align="left"/>
    </style:style>
    <style:style style:name="Tabla2.A" style:family="table-column">
      <style:table-column-properties style:column-width="7.489cm"/>
    </style:style>
    <style:style style:name="Tabla2.B" style:family="table-column">
      <style:table-column-properties style:column-width="7.992cm"/>
    </style:style>
    <style:style style:name="Tabla2.A1" style:family="table-cell">
      <style:table-cell-properties style:vertical-align="middle" fo:padding="0.049cm" fo:border="none"/>
    </style:style>
    <style:style style:name="Tabla3" style:family="table">
      <style:table-properties style:width="17cm" table:align="left"/>
    </style:style>
    <style:style style:name="Tabla3.A" style:family="table-column">
      <style:table-column-properties style:column-width="2.559cm"/>
    </style:style>
    <style:style style:name="Tabla3.B" style:family="table-column">
      <style:table-column-properties style:column-width="2.189cm"/>
    </style:style>
    <style:style style:name="Tabla3.C" style:family="table-column">
      <style:table-column-properties style:column-width="3.628cm"/>
    </style:style>
    <style:style style:name="Tabla3.D" style:family="table-column">
      <style:table-column-properties style:column-width="8.624cm"/>
    </style:style>
    <style:style style:name="Tabla3.A1" style:family="table-cell">
      <style:table-cell-properties style:vertical-align="middle" fo:padding="0.049cm" fo:border="none"/>
    </style:style>
    <style:style style:name="Tabla4" style:family="table">
      <style:table-properties style:width="12.649cm" table:align="left"/>
    </style:style>
    <style:style style:name="Tabla4.A" style:family="table-column">
      <style:table-column-properties style:column-width="2.353cm"/>
    </style:style>
    <style:style style:name="Tabla4.B" style:family="table-column">
      <style:table-column-properties style:column-width="2.692cm"/>
    </style:style>
    <style:style style:name="Tabla4.C" style:family="table-column">
      <style:table-column-properties style:column-width="2.833cm"/>
    </style:style>
    <style:style style:name="Tabla4.D" style:family="table-column">
      <style:table-column-properties style:column-width="4.771cm"/>
    </style:style>
    <style:style style:name="Tabla4.A1" style:family="table-cell">
      <style:table-cell-properties style:vertical-align="middle" fo:padding="0.049cm" fo:border="none"/>
    </style:style>
    <style:style style:name="Tabla5" style:family="table">
      <style:table-properties style:width="15.36cm" table:align="left"/>
    </style:style>
    <style:style style:name="Tabla5.A" style:family="table-column">
      <style:table-column-properties style:column-width="1.436cm"/>
    </style:style>
    <style:style style:name="Tabla5.B" style:family="table-column">
      <style:table-column-properties style:column-width="1.434cm"/>
    </style:style>
    <style:style style:name="Tabla5.C" style:family="table-column">
      <style:table-column-properties style:column-width="5.442cm"/>
    </style:style>
    <style:style style:name="Tabla5.D" style:family="table-column">
      <style:table-column-properties style:column-width="7.049cm"/>
    </style:style>
    <style:style style:name="Tabla5.A1" style:family="table-cell">
      <style:table-cell-properties style:vertical-align="middle" fo:padding="0.049cm" fo:border="none"/>
    </style:style>
    <style:style style:name="Tabla6" style:family="table">
      <style:table-properties style:width="9.664cm" table:align="left"/>
    </style:style>
    <style:style style:name="Tabla6.A" style:family="table-column">
      <style:table-column-properties style:column-width="1.436cm"/>
    </style:style>
    <style:style style:name="Tabla6.B" style:family="table-column">
      <style:table-column-properties style:column-width="4.962cm"/>
    </style:style>
    <style:style style:name="Tabla6.C" style:family="table-column">
      <style:table-column-properties style:column-width="3.267cm"/>
    </style:style>
    <style:style style:name="Tabla6.A1" style:family="table-cell">
      <style:table-cell-properties style:vertical-align="middle" fo:padding="0.049cm" fo:border="none"/>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font-weight="bold" officeooo:rsid="021e0853" officeooo:paragraph-rsid="021e0853" style:font-size-asian="18pt" style:font-weight-asian="bold" style:font-size-complex="18pt" style:font-weight-complex="bold"/>
    </style:style>
    <style:style style:name="P3" style:family="paragraph" style:parent-style-name="Heading_20_1">
      <style:paragraph-properties fo:text-align="justify" style:justify-single-word="false" fo:break-before="page"/>
      <style:text-properties officeooo:rsid="0238fcf9" officeooo:paragraph-rsid="0245714a"/>
    </style:style>
    <style:style style:name="P4" style:family="paragraph" style:parent-style-name="Heading_20_1">
      <style:paragraph-properties fo:text-align="justify" style:justify-single-word="false" fo:break-before="page"/>
      <style:text-properties officeooo:rsid="0238fcf9" officeooo:paragraph-rsid="0238fcf9"/>
    </style:style>
    <style:style style:name="P5" style:family="paragraph" style:parent-style-name="Text_20_body">
      <style:paragraph-properties fo:text-align="justify" style:justify-single-word="false"/>
      <style:text-properties fo:font-size="12pt" fo:font-weight="normal" officeooo:rsid="024636c6" officeooo:paragraph-rsid="0245714a" style:font-size-asian="10.5pt" style:font-weight-asian="normal" style:font-size-complex="12pt" style:font-weight-complex="normal"/>
    </style:style>
    <style:style style:name="P6" style:family="paragraph" style:parent-style-name="Text_20_body">
      <style:paragraph-properties fo:text-align="justify" style:justify-single-word="false"/>
      <style:text-properties fo:font-size="12pt" fo:font-weight="normal" officeooo:rsid="0259afc0" officeooo:paragraph-rsid="0259afc0" style:font-size-asian="10.5pt" style:font-weight-asian="normal" style:font-size-complex="12pt" style:font-weight-complex="normal"/>
    </style:style>
    <style:style style:name="P7" style:family="paragraph" style:parent-style-name="Text_20_body">
      <style:paragraph-properties fo:text-align="justify" style:justify-single-word="false"/>
      <style:text-properties fo:font-size="12pt" fo:font-weight="normal" officeooo:rsid="025d14b7" officeooo:paragraph-rsid="025d14b7" style:font-size-asian="10.5pt" style:font-weight-asian="normal" style:font-size-complex="12pt" style:font-weight-complex="normal"/>
    </style:style>
    <style:style style:name="P8" style:family="paragraph" style:parent-style-name="Text_20_body">
      <style:paragraph-properties fo:margin-top="0cm" fo:margin-bottom="0cm" style:contextual-spacing="false" fo:text-align="justify" style:justify-single-word="false"/>
      <style:text-properties fo:font-size="12pt" fo:font-weight="normal" officeooo:rsid="0245714a" officeooo:paragraph-rsid="0245714a" style:font-size-asian="10.5pt" style:font-weight-asian="normal" style:font-size-complex="12pt" style:font-weight-complex="normal"/>
    </style:style>
    <style:style style:name="P9" style:family="paragraph" style:parent-style-name="Text_20_body">
      <style:paragraph-properties fo:text-align="justify" style:justify-single-word="false"/>
      <style:text-properties fo:font-size="12pt" fo:font-weight="normal" officeooo:rsid="02964223" officeooo:paragraph-rsid="02964223" style:font-size-asian="10.5pt" style:font-weight-asian="normal" style:font-size-complex="12pt" style:font-weight-complex="normal"/>
    </style:style>
    <style:style style:name="P10" style:family="paragraph" style:parent-style-name="Text_20_body">
      <style:paragraph-properties fo:margin-top="0cm" fo:margin-bottom="0cm" style:contextual-spacing="false"/>
      <style:text-properties fo:font-size="12pt" officeooo:paragraph-rsid="0254716c" style:font-size-asian="12pt" style:font-size-complex="12pt"/>
    </style:style>
    <style:style style:name="P11" style:family="paragraph" style:parent-style-name="Text_20_body">
      <style:paragraph-properties fo:margin-top="0cm" fo:margin-bottom="0cm" style:contextual-spacing="false" fo:text-align="justify" style:justify-single-word="false"/>
      <style:text-properties fo:font-size="12pt" officeooo:rsid="025d14b7" officeooo:paragraph-rsid="025d14b7" style:font-size-asian="12pt" style:font-size-complex="12pt"/>
    </style:style>
    <style:style style:name="P12" style:family="paragraph" style:parent-style-name="Text_20_body">
      <style:paragraph-properties fo:margin-top="0cm" fo:margin-bottom="0cm" style:contextual-spacing="false" fo:text-align="justify" style:justify-single-word="false" fo:break-before="page"/>
      <style:text-properties fo:font-size="12pt" officeooo:rsid="025d14b7" officeooo:paragraph-rsid="025d14b7" style:font-size-asian="12pt" style:font-size-complex="12pt"/>
    </style:style>
    <style:style style:name="P13" style:family="paragraph" style:parent-style-name="Text_20_body">
      <style:paragraph-properties fo:margin-top="0cm" fo:margin-bottom="0cm" style:contextual-spacing="false" fo:text-align="justify" style:justify-single-word="false"/>
      <style:text-properties fo:font-size="12pt" officeooo:rsid="0264105b" officeooo:paragraph-rsid="025d14b7" style:font-size-asian="12pt" style:font-size-complex="12pt"/>
    </style:style>
    <style:style style:name="P14" style:family="paragraph" style:parent-style-name="Text_20_body">
      <style:text-properties fo:font-size="12pt" officeooo:rsid="026f4948" officeooo:paragraph-rsid="026f4948" style:font-size-asian="12pt" style:font-size-complex="12pt"/>
    </style:style>
    <style:style style:name="P15" style:family="paragraph" style:parent-style-name="Text_20_body">
      <style:paragraph-properties fo:break-before="page"/>
      <style:text-properties fo:font-size="12pt" officeooo:rsid="026f4948" officeooo:paragraph-rsid="026f4948" style:font-size-asian="12pt" style:font-size-complex="12pt"/>
    </style:style>
    <style:style style:name="P16" style:family="paragraph" style:parent-style-name="Text_20_body">
      <style:paragraph-properties fo:margin-top="0cm" fo:margin-bottom="0cm" style:contextual-spacing="false"/>
      <style:text-properties fo:font-size="12pt" officeooo:rsid="026f4948" officeooo:paragraph-rsid="026f4948" style:font-size-asian="12pt" style:font-size-complex="12pt"/>
    </style:style>
    <style:style style:name="P17" style:family="paragraph" style:parent-style-name="Text_20_body">
      <style:paragraph-properties fo:margin-top="0cm" fo:margin-bottom="0cm" style:contextual-spacing="false" fo:break-before="page"/>
      <style:text-properties fo:font-size="12pt" officeooo:rsid="026f4948" officeooo:paragraph-rsid="026f4948" style:font-size-asian="12pt" style:font-size-complex="12pt"/>
    </style:style>
    <style:style style:name="P18" style:family="paragraph" style:parent-style-name="Text_20_body">
      <style:text-properties fo:font-size="12pt" officeooo:rsid="02718029" officeooo:paragraph-rsid="02718029" style:font-size-asian="12pt" style:font-size-complex="12pt"/>
    </style:style>
    <style:style style:name="P19" style:family="paragraph" style:parent-style-name="Text_20_body">
      <style:paragraph-properties fo:break-before="page"/>
      <style:text-properties fo:font-size="12pt" officeooo:rsid="02718029" officeooo:paragraph-rsid="02718029" style:font-size-asian="12pt" style:font-size-complex="12pt"/>
    </style:style>
    <style:style style:name="P20" style:family="paragraph" style:parent-style-name="Text_20_body">
      <style:text-properties fo:font-size="12pt" officeooo:rsid="0271e8af" officeooo:paragraph-rsid="0271e8af" style:font-size-asian="12pt" style:font-size-complex="12pt"/>
    </style:style>
    <style:style style:name="P21" style:family="paragraph" style:parent-style-name="Text_20_body">
      <style:text-properties fo:font-size="12pt" officeooo:rsid="027cba01" officeooo:paragraph-rsid="027cba01" style:font-size-asian="12pt" style:font-size-complex="12pt"/>
    </style:style>
    <style:style style:name="P22" style:family="paragraph" style:parent-style-name="Text_20_body">
      <style:text-properties fo:font-size="12pt" officeooo:rsid="0272ca53" officeooo:paragraph-rsid="0271e8af" style:font-size-asian="12pt" style:font-size-complex="12pt"/>
    </style:style>
    <style:style style:name="P23" style:family="paragraph" style:parent-style-name="Text_20_body">
      <style:text-properties fo:font-size="12pt" officeooo:rsid="0280a7b4" officeooo:paragraph-rsid="0280a7b4" style:font-size-asian="12pt" style:font-size-complex="12pt"/>
    </style:style>
    <style:style style:name="P24" style:family="paragraph" style:parent-style-name="Text_20_body">
      <style:paragraph-properties fo:text-align="justify" style:justify-single-word="false"/>
      <style:text-properties fo:font-size="12pt" officeooo:rsid="0282d022" officeooo:paragraph-rsid="0282d022" style:font-size-asian="12pt" style:font-size-complex="12pt"/>
    </style:style>
    <style:style style:name="P25" style:family="paragraph" style:parent-style-name="Text_20_body">
      <style:paragraph-properties fo:margin-top="0cm" fo:margin-bottom="0cm" style:contextual-spacing="false" fo:text-align="justify" style:justify-single-word="false"/>
      <style:text-properties fo:font-size="12pt" officeooo:rsid="0282d022" officeooo:paragraph-rsid="0282d022" style:font-size-asian="12pt" style:font-size-complex="12pt"/>
    </style:style>
    <style:style style:name="P26" style:family="paragraph" style:parent-style-name="Text_20_body">
      <style:text-properties fo:font-size="12pt" officeooo:rsid="028380af" officeooo:paragraph-rsid="028380af" style:font-size-asian="12pt" style:font-size-complex="12pt"/>
    </style:style>
    <style:style style:name="P27" style:family="paragraph" style:parent-style-name="Text_20_body">
      <style:paragraph-properties fo:text-align="justify" style:justify-single-word="false"/>
      <style:text-properties fo:font-size="12pt" officeooo:rsid="028380af" officeooo:paragraph-rsid="028380af" style:font-size-asian="12pt" style:font-size-complex="12pt"/>
    </style:style>
    <style:style style:name="P28" style:family="paragraph" style:parent-style-name="Text_20_body">
      <style:paragraph-properties fo:margin-top="0cm" fo:margin-bottom="0cm" style:contextual-spacing="false" fo:text-align="justify" style:justify-single-word="false"/>
      <style:text-properties fo:font-size="12pt" officeooo:rsid="028380af" officeooo:paragraph-rsid="028380af" style:font-size-asian="12pt" style:font-size-complex="12pt"/>
    </style:style>
    <style:style style:name="P29" style:family="paragraph" style:parent-style-name="Text_20_body">
      <style:paragraph-properties fo:text-align="justify" style:justify-single-word="false"/>
      <style:text-properties fo:font-size="12pt" officeooo:rsid="0286aaaf" officeooo:paragraph-rsid="0286aaaf" style:font-size-asian="12pt" style:font-size-complex="12pt"/>
    </style:style>
    <style:style style:name="P30" style:family="paragraph" style:parent-style-name="Text_20_body">
      <style:paragraph-properties fo:margin-top="0cm" fo:margin-bottom="0cm" style:contextual-spacing="false" fo:break-before="page"/>
      <style:text-properties fo:font-size="12pt" officeooo:rsid="028730bb" officeooo:paragraph-rsid="028730bb" style:font-size-asian="12pt" style:font-size-complex="12pt"/>
    </style:style>
    <style:style style:name="P31" style:family="paragraph" style:parent-style-name="Text_20_body">
      <style:paragraph-properties fo:text-align="justify" style:justify-single-word="false"/>
      <style:text-properties fo:font-size="12pt" officeooo:rsid="028730bb" officeooo:paragraph-rsid="028730bb" style:font-size-asian="12pt" style:font-size-complex="12pt"/>
    </style:style>
    <style:style style:name="P32" style:family="paragraph" style:parent-style-name="Text_20_body">
      <style:text-properties fo:font-size="12pt" officeooo:rsid="028864d6" officeooo:paragraph-rsid="028864d6" style:font-size-asian="12pt" style:font-size-complex="12pt"/>
    </style:style>
    <style:style style:name="P33" style:family="paragraph" style:parent-style-name="Text_20_body">
      <style:paragraph-properties fo:text-align="justify" style:justify-single-word="false"/>
      <style:text-properties fo:font-size="12pt" officeooo:rsid="028a3b0e" officeooo:paragraph-rsid="028a3b0e" style:font-size-asian="12pt" style:font-size-complex="12pt"/>
    </style:style>
    <style:style style:name="P34" style:family="paragraph" style:parent-style-name="Text_20_body">
      <style:paragraph-properties fo:text-align="justify" style:justify-single-word="false"/>
      <style:text-properties fo:font-size="12pt" officeooo:rsid="028e9f14" officeooo:paragraph-rsid="028e9f14" style:font-size-asian="12pt" style:font-size-complex="12pt"/>
    </style:style>
    <style:style style:name="P35" style:family="paragraph" style:parent-style-name="Text_20_body">
      <style:paragraph-properties fo:margin-top="0cm" fo:margin-bottom="0cm" style:contextual-spacing="false" fo:text-align="justify" style:justify-single-word="false"/>
      <style:text-properties fo:font-size="12pt" officeooo:rsid="028e9f14" officeooo:paragraph-rsid="028e9f14" style:font-size-asian="12pt" style:font-size-complex="12pt"/>
    </style:style>
    <style:style style:name="P36" style:family="paragraph" style:parent-style-name="Text_20_body">
      <style:text-properties fo:font-size="12pt" officeooo:rsid="0297165f" officeooo:paragraph-rsid="0297165f" style:font-size-asian="12pt" style:font-size-complex="12pt"/>
    </style:style>
    <style:style style:name="P37" style:family="paragraph" style:parent-style-name="Default">
      <style:paragraph-properties fo:text-align="end" style:justify-single-word="false"/>
      <style:text-properties officeooo:paragraph-rsid="02507bfd"/>
    </style:style>
    <style:style style:name="P38" style:family="paragraph" style:parent-style-name="Heading_20_1">
      <style:paragraph-properties fo:text-align="justify" style:justify-single-word="false" fo:break-before="page"/>
      <style:text-properties officeooo:paragraph-rsid="0256a7ad"/>
    </style:style>
    <style:style style:name="P39" style:family="paragraph" style:parent-style-name="Text_20_body">
      <style:paragraph-properties fo:text-align="justify" style:justify-single-word="false"/>
      <style:text-properties officeooo:paragraph-rsid="0259afc0"/>
    </style:style>
    <style:style style:name="P40" style:family="paragraph" style:parent-style-name="Text_20_body">
      <style:paragraph-properties fo:text-align="justify" style:justify-single-word="false"/>
      <style:text-properties officeooo:paragraph-rsid="025d14b7"/>
    </style:style>
    <style:style style:name="P41" style:family="paragraph" style:parent-style-name="Text_20_body">
      <style:paragraph-properties fo:margin-top="0cm" fo:margin-bottom="0cm" style:contextual-spacing="false" fo:text-align="justify" style:justify-single-word="false"/>
      <style:text-properties officeooo:paragraph-rsid="025e57b8"/>
    </style:style>
    <style:style style:name="P42" style:family="paragraph" style:parent-style-name="Heading_20_1">
      <style:paragraph-properties fo:text-align="justify" style:justify-single-word="false"/>
      <style:text-properties officeooo:paragraph-rsid="01b1c638"/>
    </style:style>
    <style:style style:name="P43" style:family="paragraph" style:parent-style-name="Heading_20_1">
      <style:paragraph-properties fo:text-align="justify" style:justify-single-word="false" fo:break-before="page"/>
      <style:text-properties officeooo:paragraph-rsid="01b1c638"/>
    </style:style>
    <style:style style:name="P44" style:family="paragraph" style:parent-style-name="Standard">
      <style:paragraph-properties fo:text-align="justify" style:justify-single-word="false" fo:break-before="page"/>
    </style:style>
    <style:style style:name="P45" style:family="paragraph" style:parent-style-name="Standard">
      <style:paragraph-properties fo:text-align="justify" style:justify-single-word="false"/>
    </style:style>
    <style:style style:name="P46" style:family="paragraph" style:parent-style-name="Text_20_body">
      <style:paragraph-properties fo:text-align="justify" style:justify-single-word="false"/>
      <style:text-properties officeooo:paragraph-rsid="0285d36b"/>
    </style:style>
    <style:style style:name="P47" style:family="paragraph" style:parent-style-name="Text_20_body">
      <style:paragraph-properties fo:margin-top="0cm" fo:margin-bottom="0cm" style:contextual-spacing="false" fo:text-align="justify" style:justify-single-word="false"/>
      <style:text-properties officeooo:paragraph-rsid="0280a7b4"/>
    </style:style>
    <style:style style:name="P48" style:family="paragraph" style:parent-style-name="Standard">
      <style:text-properties officeooo:paragraph-rsid="001d36d6"/>
    </style:style>
    <style:style style:name="P49" style:family="paragraph" style:parent-style-name="Text_20_body">
      <style:paragraph-properties fo:text-align="justify" style:justify-single-word="false"/>
      <style:text-properties officeooo:rsid="0259afc0" officeooo:paragraph-rsid="0259afc0"/>
    </style:style>
    <style:style style:name="P50" style:family="paragraph" style:parent-style-name="Text_20_body">
      <style:paragraph-properties fo:margin-top="0cm" fo:margin-bottom="0cm" style:contextual-spacing="false" fo:text-align="justify" style:justify-single-word="false"/>
      <style:text-properties officeooo:rsid="025b44b8" officeooo:paragraph-rsid="025b44b8"/>
    </style:style>
    <style:style style:name="P51" style:family="paragraph" style:parent-style-name="Text_20_body">
      <style:paragraph-properties fo:text-align="justify" style:justify-single-word="false"/>
      <style:text-properties officeooo:rsid="025bb747" officeooo:paragraph-rsid="025bb747"/>
    </style:style>
    <style:style style:name="P52" style:family="paragraph" style:parent-style-name="Text_20_body">
      <style:paragraph-properties fo:text-align="justify" style:justify-single-word="false"/>
      <style:text-properties officeooo:rsid="025c5f4c" officeooo:paragraph-rsid="025c5f4c"/>
    </style:style>
    <style:style style:name="P53" style:family="paragraph" style:parent-style-name="Text_20_body">
      <style:paragraph-properties fo:margin-top="0cm" fo:margin-bottom="0cm" style:contextual-spacing="false" fo:text-align="justify" style:justify-single-word="false"/>
      <style:text-properties style:font-name="Liberation Serif" fo:font-size="12pt" officeooo:rsid="025d14b7" officeooo:paragraph-rsid="025d14b7" style:font-size-asian="12pt" style:font-size-complex="12pt"/>
    </style:style>
    <style:style style:name="P54" style:family="paragraph" style:parent-style-name="Text_20_body">
      <style:paragraph-properties fo:margin-top="0cm" fo:margin-bottom="0cm" style:contextual-spacing="false" fo:text-align="justify" style:justify-single-word="false" fo:break-before="page"/>
      <style:text-properties style:font-name="Liberation Serif" fo:font-size="12pt" officeooo:rsid="025d14b7" officeooo:paragraph-rsid="025d14b7" style:font-size-asian="12pt" style:font-size-complex="12pt"/>
    </style:style>
    <style:style style:name="P55" style:family="paragraph" style:parent-style-name="Text_20_body">
      <style:paragraph-properties fo:margin-top="0cm" fo:margin-bottom="0cm" style:contextual-spacing="false" fo:text-align="justify" style:justify-single-word="false"/>
      <style:text-properties style:font-name="Liberation Serif" fo:font-size="12pt" officeooo:rsid="025d14b7" officeooo:paragraph-rsid="02677de0" style:font-size-asian="12pt" style:font-size-complex="12pt"/>
    </style:style>
    <style:style style:name="P56" style:family="paragraph" style:parent-style-name="Text_20_body">
      <style:paragraph-properties fo:margin-top="0cm" fo:margin-bottom="0cm" style:contextual-spacing="false" fo:line-height="115%" fo:text-align="justify" style:justify-single-word="false"/>
      <style:text-properties style:font-name="Liberation Serif" fo:font-size="12pt" officeooo:rsid="025d14b7" officeooo:paragraph-rsid="025d14b7" style:font-size-asian="12pt" style:font-size-complex="12pt"/>
    </style:style>
    <style:style style:name="P57" style:family="paragraph" style:parent-style-name="Text_20_body">
      <style:paragraph-properties fo:margin-top="0cm" fo:margin-bottom="0cm" style:contextual-spacing="false" fo:text-align="justify" style:justify-single-word="false"/>
      <style:text-properties style:font-name="Liberation Serif" fo:font-size="12pt" officeooo:rsid="025fa2ff" officeooo:paragraph-rsid="025fa2ff" style:font-size-asian="12pt" style:font-size-complex="12pt"/>
    </style:style>
    <style:style style:name="P58" style:family="paragraph" style:parent-style-name="Text_20_body">
      <style:paragraph-properties fo:margin-top="0cm" fo:margin-bottom="0cm" style:contextual-spacing="false" fo:text-align="justify" style:justify-single-word="false"/>
      <style:text-properties style:font-name="Liberation Serif" fo:font-size="12pt" officeooo:rsid="02669c34" officeooo:paragraph-rsid="02669c34" style:font-size-asian="12pt" style:font-size-complex="12pt"/>
    </style:style>
    <style:style style:name="P59" style:family="paragraph" style:parent-style-name="Text_20_body">
      <style:paragraph-properties fo:margin-top="0cm" fo:margin-bottom="0cm" style:contextual-spacing="false" fo:text-align="justify" style:justify-single-word="false"/>
      <style:text-properties style:font-name="Liberation Serif" fo:font-size="12pt" officeooo:rsid="02669c34" officeooo:paragraph-rsid="02677de0" style:font-size-asian="12pt" style:font-size-complex="12pt"/>
    </style:style>
    <style:style style:name="P60" style:family="paragraph" style:parent-style-name="Text_20_body">
      <style:paragraph-properties fo:margin-top="0cm" fo:margin-bottom="0cm" style:contextual-spacing="false" fo:text-align="justify" style:justify-single-word="false"/>
      <style:text-properties style:font-name="Liberation Serif" fo:font-size="12pt" officeooo:rsid="02677de0" officeooo:paragraph-rsid="02677de0" style:font-size-asian="12pt" style:font-size-complex="12pt"/>
    </style:style>
    <style:style style:name="P61" style:family="paragraph" style:parent-style-name="Text_20_body">
      <style:paragraph-properties fo:margin-top="0cm" fo:margin-bottom="0cm" style:contextual-spacing="false" fo:text-align="justify" style:justify-single-word="false"/>
      <style:text-properties style:font-name="Liberation Serif" fo:font-size="12pt" officeooo:rsid="0268a7dc" officeooo:paragraph-rsid="0268a7dc" style:font-size-asian="12pt" style:font-size-complex="12pt"/>
    </style:style>
    <style:style style:name="P62" style:family="paragraph" style:parent-style-name="Text_20_body">
      <style:paragraph-properties fo:margin-top="0cm" fo:margin-bottom="0cm" style:contextual-spacing="false" fo:text-align="justify" style:justify-single-word="false"/>
      <style:text-properties style:font-name="Liberation Serif" fo:font-size="12pt" officeooo:rsid="026930f7" officeooo:paragraph-rsid="026930f7" style:font-size-asian="12pt" style:font-size-complex="12pt"/>
    </style:style>
    <style:style style:name="P63" style:family="paragraph" style:parent-style-name="Text_20_body">
      <style:paragraph-properties fo:margin-top="0cm" fo:margin-bottom="0cm" style:contextual-spacing="false" fo:line-height="115%" fo:text-align="justify" style:justify-single-word="false"/>
      <style:text-properties style:font-name="Liberation Serif" fo:font-size="12pt" officeooo:rsid="026930f7" officeooo:paragraph-rsid="026930f7" style:font-size-asian="12pt" style:font-size-complex="12pt"/>
    </style:style>
    <style:style style:name="P64" style:family="paragraph" style:parent-style-name="Text_20_body">
      <style:paragraph-properties fo:margin-top="0cm" fo:margin-bottom="0cm" style:contextual-spacing="false" fo:text-align="justify" style:justify-single-word="false"/>
      <style:text-properties style:font-name="Liberation Serif" fo:font-size="12pt" officeooo:rsid="0267a804" officeooo:paragraph-rsid="0267a804" style:font-size-asian="12pt" style:font-size-complex="12pt"/>
    </style:style>
    <style:style style:name="P65" style:family="paragraph" style:parent-style-name="Text_20_body">
      <style:text-properties style:font-name="Liberation Serif" fo:font-size="12pt" officeooo:rsid="02718029" officeooo:paragraph-rsid="02718029" style:font-size-asian="12pt" style:font-size-complex="12pt"/>
    </style:style>
    <style:style style:name="P66" style:family="paragraph" style:parent-style-name="Text_20_body">
      <style:paragraph-properties fo:break-before="page"/>
      <style:text-properties style:font-name="Liberation Serif" fo:font-size="12pt" officeooo:rsid="02718029" officeooo:paragraph-rsid="02718029" style:font-size-asian="12pt" style:font-size-complex="12pt"/>
    </style:style>
    <style:style style:name="P67" style:family="paragraph" style:parent-style-name="Text_20_body">
      <style:paragraph-properties fo:text-align="justify" style:justify-single-word="false"/>
      <style:text-properties style:font-name="Liberation Serif" fo:font-size="12pt" officeooo:rsid="02718029" officeooo:paragraph-rsid="02718029" style:font-size-asian="12pt" style:font-size-complex="12pt"/>
    </style:style>
    <style:style style:name="P68" style:family="paragraph" style:parent-style-name="Text_20_body">
      <style:text-properties style:font-name="Liberation Serif" fo:font-size="12pt" officeooo:rsid="0271e8af" officeooo:paragraph-rsid="0271e8af" style:font-size-asian="12pt" style:font-size-complex="12pt"/>
    </style:style>
    <style:style style:name="P69" style:family="paragraph" style:parent-style-name="Text_20_body">
      <style:paragraph-properties fo:margin-top="0cm" fo:margin-bottom="0cm" style:contextual-spacing="false"/>
      <style:text-properties style:font-name="Liberation Serif" fo:font-size="12pt" officeooo:rsid="0272764b" officeooo:paragraph-rsid="0272764b" style:font-size-asian="12pt" style:font-size-complex="12pt"/>
    </style:style>
    <style:style style:name="P70" style:family="paragraph" style:parent-style-name="Text_20_body">
      <style:paragraph-properties fo:margin-top="0cm" fo:margin-bottom="0cm" style:contextual-spacing="false" fo:break-before="page"/>
      <style:text-properties style:font-name="Liberation Serif" fo:font-size="12pt" officeooo:rsid="0272764b" officeooo:paragraph-rsid="0272764b" style:font-size-asian="12pt" style:font-size-complex="12pt"/>
    </style:style>
    <style:style style:name="P71" style:family="paragraph" style:parent-style-name="Text_20_body">
      <style:text-properties style:font-name="Liberation Serif" fo:font-size="12pt" officeooo:rsid="027cba01" officeooo:paragraph-rsid="027cba01" style:font-size-asian="12pt" style:font-size-complex="12pt"/>
    </style:style>
    <style:style style:name="P72" style:family="paragraph" style:parent-style-name="Text_20_body">
      <style:text-properties style:font-name="Liberation Serif" fo:font-size="12pt" officeooo:rsid="0280a7b4" officeooo:paragraph-rsid="0280a7b4" style:font-size-asian="12pt" style:font-size-complex="12pt"/>
    </style:style>
    <style:style style:name="P73" style:family="paragraph" style:parent-style-name="Text_20_body">
      <style:paragraph-properties fo:margin-top="0cm" fo:margin-bottom="0cm" style:contextual-spacing="false"/>
      <style:text-properties style:font-name="Liberation Serif" fo:font-size="12pt" officeooo:rsid="0280a7b4" officeooo:paragraph-rsid="0280a7b4" style:font-size-asian="12pt" style:font-size-complex="12pt"/>
    </style:style>
    <style:style style:name="P74" style:family="paragraph" style:parent-style-name="Text_20_body">
      <style:text-properties style:font-name="Liberation Serif" fo:font-size="12pt" officeooo:rsid="0288129e" officeooo:paragraph-rsid="0288129e" style:font-size-asian="12pt" style:font-size-complex="12pt"/>
    </style:style>
    <style:style style:name="P75" style:family="paragraph" style:parent-style-name="Text_20_body">
      <style:text-properties style:font-name="Liberation Serif" fo:font-size="12pt" officeooo:rsid="028a3b0e" officeooo:paragraph-rsid="028a3b0e" style:font-size-asian="12pt" style:font-size-complex="12pt"/>
    </style:style>
    <style:style style:name="P76" style:family="paragraph" style:parent-style-name="Text_20_body">
      <style:paragraph-properties fo:text-align="justify" style:justify-single-word="false"/>
      <style:text-properties style:font-name="Liberation Serif" fo:font-size="12pt" officeooo:rsid="028bf1f3" officeooo:paragraph-rsid="028bf1f3" style:font-size-asian="12pt" style:font-size-complex="12pt"/>
    </style:style>
    <style:style style:name="P77" style:family="paragraph" style:parent-style-name="Text_20_body">
      <style:paragraph-properties fo:margin-top="0cm" fo:margin-bottom="0cm" style:contextual-spacing="false" fo:text-align="justify" style:justify-single-word="false"/>
      <style:text-properties style:font-name="Liberation Serif" fo:font-size="12pt" officeooo:rsid="028bf1f3" officeooo:paragraph-rsid="028bf1f3" style:font-size-asian="12pt" style:font-size-complex="12pt"/>
    </style:style>
    <style:style style:name="P78" style:family="paragraph" style:parent-style-name="Text_20_body">
      <style:paragraph-properties fo:margin-top="0cm" fo:margin-bottom="0cm" style:contextual-spacing="false" fo:text-align="justify" style:justify-single-word="false"/>
      <style:text-properties style:font-name="Liberation Serif" fo:font-size="12pt" officeooo:rsid="026b2615" officeooo:paragraph-rsid="026b2615" style:font-size-asian="12pt" style:font-size-complex="12pt"/>
    </style:style>
    <style:style style:name="P79" style:family="paragraph" style:parent-style-name="Text_20_body">
      <style:paragraph-properties fo:margin-top="0cm" fo:margin-bottom="0cm" style:contextual-spacing="false" fo:text-align="justify" style:justify-single-word="false" fo:break-before="page"/>
      <style:text-properties style:font-name="Liberation Serif" fo:font-size="12pt" officeooo:rsid="026b2615" officeooo:paragraph-rsid="026b2615" style:font-size-asian="12pt" style:font-size-complex="12pt"/>
    </style:style>
    <style:style style:name="P80" style:family="paragraph" style:parent-style-name="Text_20_body">
      <style:text-properties style:font-name="Liberation Serif" fo:font-size="12pt" style:font-size-asian="12pt" style:font-size-complex="12pt"/>
    </style:style>
    <style:style style:name="P81" style:family="paragraph" style:parent-style-name="Text_20_body">
      <style:paragraph-properties fo:margin-top="0cm" fo:margin-bottom="0cm" style:contextual-spacing="false" fo:text-align="justify" style:justify-single-word="false"/>
      <style:text-properties style:font-name="Liberation Serif" fo:font-size="12pt" fo:font-weight="normal" officeooo:rsid="025fa2ff" officeooo:paragraph-rsid="025fa2ff" style:font-size-asian="12pt" style:font-weight-asian="normal" style:font-size-complex="12pt" style:font-weight-complex="normal"/>
    </style:style>
    <style:style style:name="P82" style:family="paragraph" style:parent-style-name="Text_20_body">
      <style:paragraph-properties fo:margin-top="0cm" fo:margin-bottom="0cm" style:contextual-spacing="false" fo:text-align="justify" style:justify-single-word="false" fo:break-before="page"/>
      <style:text-properties style:font-name="Liberation Serif" fo:font-size="12pt" fo:font-weight="normal" officeooo:rsid="025fa2ff" officeooo:paragraph-rsid="025fa2ff" style:font-size-asian="12pt" style:font-weight-asian="normal" style:font-size-complex="12pt" style:font-weight-complex="normal"/>
    </style:style>
    <style:style style:name="P83" style:family="paragraph" style:parent-style-name="Text_20_body">
      <style:paragraph-properties fo:margin-top="0cm" fo:margin-bottom="0cm" style:contextual-spacing="false" fo:text-align="justify" style:justify-single-word="false"/>
      <style:text-properties style:font-name="Liberation Serif" fo:font-size="12pt" fo:font-weight="normal" officeooo:rsid="02606cce" officeooo:paragraph-rsid="02606cce" style:font-size-asian="12pt" style:font-weight-asian="normal" style:font-size-complex="12pt" style:font-weight-complex="normal"/>
    </style:style>
    <style:style style:name="P84" style:family="paragraph" style:parent-style-name="Text_20_body">
      <style:paragraph-properties fo:margin-top="0cm" fo:margin-bottom="0cm" style:contextual-spacing="false" fo:text-align="justify" style:justify-single-word="false"/>
      <style:text-properties officeooo:rsid="02677de0" officeooo:paragraph-rsid="02677de0"/>
    </style:style>
    <style:style style:name="P85" style:family="paragraph" style:parent-style-name="Text_20_body">
      <style:paragraph-properties fo:margin-top="0cm" fo:margin-bottom="0cm" style:contextual-spacing="false" fo:text-align="justify" style:justify-single-word="false"/>
      <style:text-properties officeooo:rsid="0267a804" officeooo:paragraph-rsid="0267a804"/>
    </style:style>
    <style:style style:name="P86" style:family="paragraph" style:parent-style-name="Text_20_body">
      <style:paragraph-properties fo:margin-top="0cm" fo:margin-bottom="0cm" style:contextual-spacing="false" fo:line-height="115%" fo:text-align="justify" style:justify-single-word="false"/>
      <style:text-properties officeooo:paragraph-rsid="025e57b8"/>
    </style:style>
    <style:style style:name="P87" style:family="paragraph" style:parent-style-name="Text_20_body">
      <style:paragraph-properties fo:margin-top="0cm" fo:margin-bottom="0cm" style:contextual-spacing="false" fo:line-height="115%" fo:text-align="justify" style:justify-single-word="false"/>
      <style:text-properties officeooo:rsid="026930f7" officeooo:paragraph-rsid="026930f7"/>
    </style:style>
    <style:style style:name="P88" style:family="paragraph" style:parent-style-name="Text_20_body">
      <style:paragraph-properties fo:margin-top="0cm" fo:margin-bottom="0cm" style:contextual-spacing="false" fo:line-height="115%" fo:text-align="justify" style:justify-single-word="false" fo:break-before="page"/>
      <style:text-properties officeooo:rsid="026930f7" officeooo:paragraph-rsid="026930f7"/>
    </style:style>
    <style:style style:name="P89" style:family="paragraph" style:parent-style-name="Text_20_body">
      <style:paragraph-properties fo:margin-top="0cm" fo:margin-bottom="0cm" style:contextual-spacing="false" fo:text-align="justify" style:justify-single-word="false"/>
      <style:text-properties officeooo:rsid="026b2615" officeooo:paragraph-rsid="026b2615"/>
    </style:style>
    <style:style style:name="P90" style:family="paragraph" style:parent-style-name="Text_20_body">
      <style:paragraph-properties fo:margin-top="0cm" fo:margin-bottom="0cm" style:contextual-spacing="false" fo:text-align="justify" style:justify-single-word="false"/>
      <style:text-properties officeooo:rsid="026b263f" officeooo:paragraph-rsid="026b263f"/>
    </style:style>
    <style:style style:name="P91" style:family="paragraph" style:parent-style-name="Text_20_body">
      <style:paragraph-properties fo:margin-top="0cm" fo:margin-bottom="0cm" style:contextual-spacing="false" fo:text-align="justify" style:justify-single-word="false"/>
      <style:text-properties officeooo:rsid="026d1d17" officeooo:paragraph-rsid="026d1d17"/>
    </style:style>
    <style:style style:name="P92" style:family="paragraph" style:parent-style-name="Text_20_body">
      <style:text-properties officeooo:paragraph-rsid="0280a7b4"/>
    </style:style>
    <style:style style:name="P93" style:family="paragraph" style:parent-style-name="Contents_20_2">
      <style:paragraph-properties>
        <style:tab-stops>
          <style:tab-stop style:position="16.501cm" style:type="right" style:leader-style="dotted" style:leader-text="."/>
        </style:tab-stops>
      </style:paragraph-properties>
    </style:style>
    <style:style style:name="P94" style:family="paragraph" style:parent-style-name="Contents_20_Heading">
      <style:paragraph-properties fo:break-before="page"/>
    </style:style>
    <style:style style:name="P95" style:family="paragraph" style:parent-style-name="Figure_20_Index_20_Heading">
      <style:paragraph-properties fo:break-before="page"/>
    </style:style>
    <style:style style:name="P96" style:family="paragraph" style:parent-style-name="Figure_20_Index_20_1">
      <style:paragraph-properties>
        <style:tab-stops>
          <style:tab-stop style:position="17cm" style:type="right" style:leader-style="dotted" style:leader-text="."/>
        </style:tab-stops>
      </style:paragraph-properties>
    </style:style>
    <style:style style:name="P97" style:family="paragraph" style:parent-style-name="Frame_20_contents">
      <style:paragraph-properties>
        <style:tab-stops>
          <style:tab-stop style:position="17cm" style:type="right" style:leader-style="dotted" style:leader-text="."/>
        </style:tab-stops>
      </style:paragraph-properties>
    </style:style>
    <style:style style:name="P98" style:family="paragraph" style:parent-style-name="Table_20_Contents">
      <style:paragraph-properties fo:text-align="start" style:justify-single-word="false"/>
    </style:style>
    <style:style style:name="P99" style:family="paragraph" style:parent-style-name="Text_20_body">
      <style:text-properties officeooo:rsid="029249e1" officeooo:paragraph-rsid="029249e1"/>
    </style:style>
    <style:style style:name="P100" style:family="paragraph" style:parent-style-name="Text_20_body">
      <style:paragraph-properties fo:margin-top="0cm" fo:margin-bottom="0cm" style:contextual-spacing="false"/>
      <style:text-properties officeooo:rsid="029249e1" officeooo:paragraph-rsid="029249e1"/>
    </style:style>
    <style:style style:name="P101" style:family="paragraph" style:parent-style-name="Text_20_body">
      <style:paragraph-properties fo:break-before="page"/>
      <style:text-properties officeooo:rsid="029249e1" officeooo:paragraph-rsid="029249e1"/>
    </style:style>
    <style:style style:name="P102" style:family="paragraph" style:parent-style-name="Text_20_body">
      <style:paragraph-properties fo:margin-top="0cm" fo:margin-bottom="0cm" style:contextual-spacing="false"/>
    </style:style>
    <style:style style:name="P103" style:family="paragraph" style:parent-style-name="Text_20_body">
      <style:text-properties officeooo:rsid="029432bc" officeooo:paragraph-rsid="029432bc"/>
    </style:style>
    <style:style style:name="P104" style:family="paragraph" style:parent-style-name="Text_20_body">
      <style:text-properties officeooo:rsid="0294a192" officeooo:paragraph-rsid="0294a192"/>
    </style:style>
    <style:style style:name="P105" style:family="paragraph" style:parent-style-name="Frame_20_contents">
      <style:text-properties fo:color="#000000" loext:opacity="100%"/>
    </style:style>
    <style:style style:name="P106" style:family="paragraph" style:parent-style-name="Frame_20_contents">
      <style:paragraph-properties fo:text-align="center" style:justify-single-word="false"/>
      <style:text-properties fo:color="#000000" loext:opacity="100%"/>
    </style:style>
    <style:style style:name="P107" style:family="paragraph" style:parent-style-name="Frame_20_contents">
      <style:paragraph-properties fo:text-align="center" style:justify-single-word="false"/>
    </style:style>
    <style:style style:name="P108" style:family="paragraph" style:parent-style-name="Frame_20_contents">
      <style:paragraph-properties fo:text-align="end" style:justify-single-word="false"/>
    </style:style>
    <style:style style:name="P109" style:family="paragraph" style:parent-style-name="Heading_20_2">
      <style:text-properties officeooo:paragraph-rsid="0254716c"/>
    </style:style>
    <style:style style:name="P110" style:family="paragraph" style:parent-style-name="Heading_20_2">
      <style:paragraph-properties fo:break-before="page"/>
      <style:text-properties style:font-name="Liberation Serif" fo:font-size="14pt" officeooo:rsid="0254716c" officeooo:paragraph-rsid="0254716c" style:font-size-asian="14pt" style:font-size-complex="14pt"/>
    </style:style>
    <style:style style:name="P111" style:family="paragraph" style:parent-style-name="Heading_20_2">
      <style:text-properties style:font-name="Liberation Serif" fo:font-size="12pt" style:font-size-asian="12pt" style:font-size-complex="12pt"/>
    </style:style>
    <style:style style:name="P112" style:family="paragraph" style:parent-style-name="Heading_20_2">
      <style:paragraph-properties fo:margin-top="0cm" fo:margin-bottom="0cm" style:contextual-spacing="false" fo:break-before="page"/>
      <style:text-properties style:font-name="Liberation Serif" fo:font-size="12pt" officeooo:paragraph-rsid="0290d49c" style:font-size-asian="12pt" style:font-size-complex="12pt"/>
    </style:style>
    <style:style style:name="P113" style:family="paragraph" style:parent-style-name="Heading_20_2">
      <style:text-properties style:font-name="Liberation Serif" fo:font-size="12pt" officeooo:paragraph-rsid="0290d49c" style:font-size-asian="12pt" style:font-size-complex="12pt"/>
    </style:style>
    <style:style style:name="P114" style:family="paragraph" style:parent-style-name="Standard">
      <style:paragraph-properties fo:text-align="center" style:justify-single-word="false"/>
      <style:text-properties style:text-underline-style="none" fo:font-weight="bold" officeooo:rsid="01d93808" officeooo:paragraph-rsid="01d93808" style:font-weight-asian="bold" style:font-weight-complex="bold"/>
    </style:style>
    <style:style style:name="P115" style:family="paragraph" style:parent-style-name="Standard">
      <style:paragraph-properties fo:text-align="center" style:justify-single-word="false"/>
      <style:text-properties officeooo:paragraph-rsid="0056f43f"/>
    </style:style>
    <style:style style:name="P116" style:family="paragraph" style:parent-style-name="Standard">
      <style:paragraph-properties fo:text-align="center" style:justify-single-word="false"/>
      <style:text-properties officeooo:paragraph-rsid="001d36d6"/>
    </style:style>
    <style:style style:name="P117" style:family="paragraph" style:parent-style-name="Standard">
      <style:paragraph-properties fo:text-align="start" style:justify-single-word="false"/>
      <style:text-properties officeooo:paragraph-rsid="001d36d6"/>
    </style:style>
    <style:style style:name="P118" style:family="paragraph" style:parent-style-name="Text_20_body" style:list-style-name="L1">
      <style:paragraph-properties fo:text-align="justify" style:justify-single-word="false"/>
      <style:text-properties officeooo:rsid="025b44b8" officeooo:paragraph-rsid="025b44b8"/>
    </style:style>
    <style:style style:name="P119" style:family="paragraph" style:parent-style-name="Text_20_body">
      <style:paragraph-properties fo:margin-top="0cm" fo:margin-bottom="0cm" style:contextual-spacing="false" fo:text-align="justify" style:justify-single-word="false"/>
      <style:text-properties style:font-name="Liberation Serif" fo:font-size="12pt" officeooo:rsid="0282d022" officeooo:paragraph-rsid="0282d022" style:font-size-asian="12pt" style:font-size-complex="12pt"/>
    </style:style>
    <style:style style:name="P120" style:family="paragraph" style:parent-style-name="Text_20_body">
      <style:text-properties style:font-name="Liberation Serif" fo:font-size="12pt" officeooo:rsid="028380af" officeooo:paragraph-rsid="028380af" style:font-size-asian="12pt" style:font-size-complex="12pt"/>
    </style:style>
    <style:style style:name="P121" style:family="paragraph" style:parent-style-name="Text_20_body">
      <style:paragraph-properties fo:text-align="justify" style:justify-single-word="false"/>
      <style:text-properties style:font-name="Liberation Serif" fo:font-size="12pt" officeooo:rsid="028380af" officeooo:paragraph-rsid="028380af" style:font-size-asian="12pt" style:font-size-complex="12pt"/>
    </style:style>
    <style:style style:name="P122" style:family="paragraph" style:parent-style-name="Text_20_body">
      <style:paragraph-properties fo:text-align="justify" style:justify-single-word="false"/>
      <style:text-properties style:font-name="Liberation Serif" fo:font-size="12pt" officeooo:rsid="0284b13d" officeooo:paragraph-rsid="0284b13d" style:font-size-asian="12pt" style:font-size-complex="12pt"/>
    </style:style>
    <style:style style:name="P123" style:family="paragraph" style:parent-style-name="Text_20_body">
      <style:paragraph-properties fo:text-align="justify" style:justify-single-word="false"/>
      <style:text-properties style:font-name="Liberation Serif" fo:font-size="12pt" officeooo:rsid="0284b13d" officeooo:paragraph-rsid="0285d36b" style:font-size-asian="12pt" style:font-size-complex="12pt"/>
    </style:style>
    <style:style style:name="P124" style:family="paragraph" style:parent-style-name="Text_20_body">
      <style:paragraph-properties fo:text-align="justify" style:justify-single-word="false"/>
      <style:text-properties style:font-name="Liberation Serif" fo:font-size="12pt" officeooo:rsid="0286aaaf" officeooo:paragraph-rsid="0286aaaf" style:font-size-asian="12pt" style:font-size-complex="12pt"/>
    </style:style>
    <style:style style:name="P125" style:family="paragraph" style:parent-style-name="Text_20_body">
      <style:paragraph-properties fo:text-align="justify" style:justify-single-word="false"/>
      <style:text-properties style:font-name="Liberation Serif" fo:font-size="12pt" officeooo:rsid="028730bb" officeooo:paragraph-rsid="028730bb" style:font-size-asian="12pt" style:font-size-complex="12pt"/>
    </style:style>
    <style:style style:name="P126" style:family="paragraph" style:parent-style-name="Text_20_body" style:list-style-name="L4">
      <style:paragraph-properties fo:margin-top="0cm" fo:margin-bottom="0cm" style:contextual-spacing="false" fo:text-align="justify" style:justify-single-word="false"/>
      <style:text-properties style:font-name="Liberation Serif" fo:font-size="12pt" officeooo:rsid="025d14b7" officeooo:paragraph-rsid="025d14b7" style:font-size-asian="12pt" style:font-size-complex="12pt"/>
    </style:style>
    <style:style style:name="P127" style:family="paragraph" style:parent-style-name="Text_20_body" style:list-style-name="L4">
      <style:paragraph-properties fo:margin-top="0cm" fo:margin-bottom="0cm" style:contextual-spacing="false" fo:text-align="justify" style:justify-single-word="false"/>
      <style:text-properties style:font-name="Liberation Serif" fo:font-size="12pt" officeooo:rsid="025d14b7" officeooo:paragraph-rsid="02677de0" style:font-size-asian="12pt" style:font-size-complex="12pt"/>
    </style:style>
    <style:style style:name="P128" style:family="paragraph" style:parent-style-name="Text_20_body" style:list-style-name="L5">
      <style:paragraph-properties fo:margin-top="0cm" fo:margin-bottom="0cm" style:contextual-spacing="false" fo:text-align="justify" style:justify-single-word="false"/>
      <style:text-properties style:font-name="Liberation Serif" fo:font-size="12pt" officeooo:rsid="025fa2ff" officeooo:paragraph-rsid="025fa2ff" style:font-size-asian="12pt" style:font-size-complex="12pt"/>
    </style:style>
    <style:style style:name="P129" style:family="paragraph" style:parent-style-name="Text_20_body" style:list-style-name="L7">
      <style:paragraph-properties fo:margin-top="0cm" fo:margin-bottom="0cm" style:contextual-spacing="false" fo:text-align="justify" style:justify-single-word="false"/>
      <style:text-properties style:font-name="Liberation Serif" fo:font-size="12pt" officeooo:rsid="02677de0" officeooo:paragraph-rsid="02677de0" style:font-size-asian="12pt" style:font-size-complex="12pt"/>
    </style:style>
    <style:style style:name="P130" style:family="paragraph" style:parent-style-name="Text_20_body" style:list-style-name="L8">
      <style:paragraph-properties fo:margin-top="0cm" fo:margin-bottom="0cm" style:contextual-spacing="false" fo:text-align="justify" style:justify-single-word="false"/>
      <style:text-properties style:font-name="Liberation Serif" fo:font-size="12pt" officeooo:rsid="0267a804" officeooo:paragraph-rsid="0267a804" style:font-size-asian="12pt" style:font-size-complex="12pt"/>
    </style:style>
    <style:style style:name="P131" style:family="paragraph" style:parent-style-name="Text_20_body" style:list-style-name="L9">
      <style:text-properties style:font-name="Liberation Serif" fo:font-size="12pt" officeooo:rsid="029432bc" officeooo:paragraph-rsid="029432bc" style:font-size-asian="12pt" style:font-size-complex="12pt"/>
    </style:style>
    <style:style style:name="P132" style:family="paragraph" style:parent-style-name="Text_20_body" style:list-style-name="L9">
      <style:text-properties style:font-name="Liberation Serif" fo:font-size="12pt" officeooo:rsid="0294a192" officeooo:paragraph-rsid="0294a192" style:font-size-asian="12pt" style:font-size-complex="12pt"/>
    </style:style>
    <style:style style:name="P133" style:family="paragraph" style:parent-style-name="Text_20_body" style:list-style-name="L10">
      <style:text-properties style:font-name="Liberation Serif" fo:font-size="12pt" officeooo:rsid="029249e1" officeooo:paragraph-rsid="029249e1" style:font-size-asian="12pt" style:font-size-complex="12pt"/>
    </style:style>
    <style:style style:name="P134" style:family="paragraph" style:parent-style-name="Text_20_body">
      <style:text-properties style:font-name="Liberation Serif" fo:font-size="12pt" officeooo:rsid="029249e1" officeooo:paragraph-rsid="029249e1" style:font-size-asian="12pt" style:font-size-complex="12pt"/>
    </style:style>
    <style:style style:name="P135" style:family="paragraph" style:parent-style-name="Text_20_body" style:list-style-name="L2">
      <style:paragraph-properties fo:margin-top="0cm" fo:margin-bottom="0cm" style:contextual-spacing="false" fo:text-align="justify" style:justify-single-word="false"/>
      <style:text-properties style:font-name="Liberation Serif" fo:font-size="12pt" fo:font-weight="normal" officeooo:rsid="0282d022" officeooo:paragraph-rsid="0282d022" style:font-size-asian="12pt" style:font-weight-asian="normal" style:font-size-complex="12pt" style:font-weight-complex="normal"/>
    </style:style>
    <style:style style:name="P136" style:family="paragraph" style:parent-style-name="Text_20_body">
      <style:paragraph-properties fo:text-align="justify" style:justify-single-word="false"/>
      <style:text-properties style:font-name="Liberation Serif" fo:font-size="12pt" fo:font-weight="normal" officeooo:rsid="028e9f14" officeooo:paragraph-rsid="028e9f14" style:font-size-asian="12pt" style:font-weight-asian="normal" style:font-size-complex="12pt" style:font-weight-complex="normal"/>
    </style:style>
    <style:style style:name="P137" style:family="paragraph" style:parent-style-name="Text_20_body">
      <style:paragraph-properties fo:text-align="justify" style:justify-single-word="false"/>
      <style:text-properties style:font-name="Liberation Serif" fo:font-size="12pt" fo:font-weight="normal" officeooo:rsid="028f2b62" officeooo:paragraph-rsid="028f2b62" style:font-size-asian="12pt" style:font-weight-asian="normal" style:font-size-complex="12pt" style:font-weight-complex="normal"/>
    </style:style>
    <style:style style:name="P138" style:family="paragraph" style:parent-style-name="Text_20_body" style:list-style-name="L5">
      <style:paragraph-properties fo:margin-top="0cm" fo:margin-bottom="0cm" style:contextual-spacing="false" fo:text-align="justify" style:justify-single-word="false"/>
      <style:text-properties style:font-name="Liberation Serif" fo:font-size="12pt" fo:font-weight="normal" officeooo:rsid="025fa2ff" officeooo:paragraph-rsid="025fa2ff" style:font-size-asian="12pt" style:font-weight-asian="normal" style:font-size-complex="12pt" style:font-weight-complex="normal"/>
    </style:style>
    <style:style style:name="P139" style:family="paragraph" style:parent-style-name="Text_20_body" style:list-style-name="L6">
      <style:paragraph-properties fo:margin-top="0cm" fo:margin-bottom="0cm" style:contextual-spacing="false" fo:text-align="justify" style:justify-single-word="false"/>
      <style:text-properties style:font-name="Liberation Serif" fo:font-size="12pt" fo:font-weight="normal" officeooo:rsid="025fa2ff" officeooo:paragraph-rsid="025fa2ff" style:font-size-asian="12pt" style:font-weight-asian="normal" style:font-size-complex="12pt" style:font-weight-complex="normal"/>
    </style:style>
    <style:style style:name="P140" style:family="paragraph" style:parent-style-name="Text_20_body">
      <style:paragraph-properties fo:text-align="justify" style:justify-single-word="false"/>
      <style:text-properties style:font-name="Liberation Serif" officeooo:rsid="0285d36b" officeooo:paragraph-rsid="0286aaaf"/>
    </style:style>
    <style:style style:name="P141" style:family="paragraph" style:parent-style-name="Text_20_body" style:list-style-name="L2">
      <style:paragraph-properties fo:margin-top="0cm" fo:margin-bottom="0cm" style:contextual-spacing="false" fo:text-align="justify" style:justify-single-word="false"/>
      <style:text-properties fo:font-size="12pt" officeooo:rsid="0282d022" officeooo:paragraph-rsid="0282d022" style:font-size-asian="12pt" style:font-size-complex="12pt"/>
    </style:style>
    <style:style style:name="P142" style:family="paragraph" style:parent-style-name="Text_20_body" style:list-style-name="L3">
      <style:paragraph-properties fo:text-align="justify" style:justify-single-word="false"/>
      <style:text-properties fo:font-size="12pt" officeooo:rsid="028380af" officeooo:paragraph-rsid="028380af" style:font-size-asian="12pt" style:font-size-complex="12pt"/>
    </style:style>
    <style:style style:name="P143" style:family="paragraph" style:parent-style-name="Text_20_body">
      <style:paragraph-properties fo:margin-top="0cm" fo:margin-bottom="0cm" style:contextual-spacing="false" fo:text-align="justify" style:justify-single-word="false"/>
      <style:text-properties fo:font-size="12pt" officeooo:rsid="028380af" officeooo:paragraph-rsid="026f4948" style:font-size-asian="12pt" style:font-size-complex="12pt"/>
    </style:style>
    <style:style style:name="P144" style:family="paragraph" style:parent-style-name="Text_20_body" style:list-style-name="L4">
      <style:paragraph-properties fo:margin-top="0cm" fo:margin-bottom="0cm" style:contextual-spacing="false" fo:text-align="justify" style:justify-single-word="false"/>
      <style:text-properties fo:font-size="12pt" officeooo:rsid="025d14b7" officeooo:paragraph-rsid="025d14b7" style:font-size-asian="12pt" style:font-size-complex="12pt"/>
    </style:style>
    <style:style style:name="P145" style:family="paragraph" style:parent-style-name="Text_20_body" style:list-style-name="L5">
      <style:paragraph-properties fo:margin-top="0cm" fo:margin-bottom="0cm" style:contextual-spacing="false" fo:text-align="justify" style:justify-single-word="false"/>
      <style:text-properties officeooo:rsid="025fa2ff" officeooo:paragraph-rsid="025fa2ff"/>
    </style:style>
    <style:style style:name="P146" style:family="paragraph" style:parent-style-name="Text_20_body" style:list-style-name="L4">
      <style:paragraph-properties fo:margin-top="0cm" fo:margin-bottom="0cm" style:contextual-spacing="false" fo:text-align="justify" style:justify-single-word="false" fo:break-before="page"/>
      <style:text-properties officeooo:rsid="026930f7" officeooo:paragraph-rsid="026930f7"/>
    </style:style>
    <style:style style:name="P147" style:family="paragraph" style:parent-style-name="Text_20_body" style:list-style-name="L4">
      <style:paragraph-properties fo:margin-top="0cm" fo:margin-bottom="0cm" style:contextual-spacing="false" fo:text-align="justify" style:justify-single-word="false"/>
      <style:text-properties officeooo:paragraph-rsid="025e57b8"/>
    </style:style>
    <style:style style:name="P148" style:family="paragraph" style:parent-style-name="Text_20_body">
      <style:paragraph-properties fo:text-align="justify" style:justify-single-word="false"/>
      <style:text-properties officeooo:paragraph-rsid="02a140d1"/>
    </style:style>
    <style:style style:name="P149" style:family="paragraph">
      <loext:graphic-properties draw:fill="bitmap" draw:fill-image-name="msFillBitmap_20_1" draw:fill-image-width="4.336cm" draw:fill-image-height="4.336cm" style:repeat="repeat" draw:fill-image-ref-point-x="0%" draw:fill-image-ref-point-y="0%" draw:fill-image-ref-point="top-left"/>
      <style:paragraph-properties fo:text-align="start"/>
      <style:text-properties fo:color="#000000" loext:opacity="100%" fo:font-size="18pt"/>
    </style:style>
    <style:style style:name="T1" style:family="text">
      <style:text-properties fo:font-size="20pt" style:text-underline-style="solid" style:text-underline-width="auto" style:text-underline-color="font-color" style:font-size-asian="20pt" style:font-size-complex="20pt"/>
    </style:style>
    <style:style style:name="T2" style:family="text">
      <style:text-properties fo:color="#000000" loext:opacity="100%"/>
    </style:style>
    <style:style style:name="T3" style:family="text">
      <style:text-properties fo:color="#000000" loext:opacity="100%" officeooo:rsid="01976bea"/>
    </style:style>
    <style:style style:name="T4" style:family="text">
      <style:text-properties fo:color="#000000" loext:opacity="100%" officeooo:rsid="01e53000"/>
    </style:style>
    <style:style style:name="T5" style:family="text">
      <style:text-properties fo:color="#000000" loext:opacity="100%" officeooo:rsid="020432a5"/>
    </style:style>
    <style:style style:name="T6" style:family="text">
      <style:text-properties fo:color="#000000" loext:opacity="100%" officeooo:rsid="02507bfd"/>
    </style:style>
    <style:style style:name="T7" style:family="text">
      <style:text-properties fo:font-size="16pt" style:text-underline-style="solid" style:text-underline-width="auto" style:text-underline-color="font-color" style:font-size-asian="16pt" style:font-size-complex="16pt"/>
    </style:style>
    <style:style style:name="T8" style:family="text">
      <style:text-properties fo:font-size="16pt" style:font-size-asian="16pt" style:font-size-complex="16pt"/>
    </style:style>
    <style:style style:name="T9" style:family="text">
      <style:text-properties style:text-underline-style="solid" style:text-underline-width="auto" style:text-underline-color="font-color"/>
    </style:style>
    <style:style style:name="T10" style:family="text">
      <style:text-properties fo:font-size="11.5pt" style:font-size-asian="11.5pt"/>
    </style:style>
    <style:style style:name="T11" style:family="text">
      <style:text-properties fo:font-size="11.5pt" officeooo:rsid="0244735e" style:font-size-asian="11.5pt"/>
    </style:style>
    <style:style style:name="T12" style:family="text">
      <style:text-properties fo:font-size="11.5pt" officeooo:rsid="02059936" style:font-size-asian="11.5pt"/>
    </style:style>
    <style:style style:name="T13" style:family="text">
      <style:text-properties fo:font-size="15pt" fo:font-weight="bold" style:font-size-asian="15pt" style:font-weight-asian="bold" style:font-size-complex="15pt" style:font-weight-complex="bold"/>
    </style:style>
    <style:style style:name="T14" style:family="text">
      <style:text-properties fo:font-size="15pt" fo:font-weight="bold" officeooo:rsid="021ba583" style:font-size-asian="15pt" style:font-weight-asian="bold" style:font-size-complex="15pt" style:font-weight-complex="bold"/>
    </style:style>
    <style:style style:name="T15" style:family="text">
      <style:text-properties fo:font-size="15pt" fo:font-weight="bold" officeooo:rsid="01dae5c6" style:font-size-asian="15pt" style:font-weight-asian="bold" style:font-size-complex="15pt" style:font-weight-complex="bold"/>
    </style:style>
    <style:style style:name="T16" style:family="text">
      <style:text-properties fo:font-size="15pt" fo:font-weight="bold" officeooo:rsid="0240976c" style:font-size-asian="15pt" style:font-weight-asian="bold" style:font-size-complex="15pt" style:font-weight-complex="bold"/>
    </style:style>
    <style:style style:name="T17" style:family="text">
      <style:text-properties fo:font-size="15pt" fo:font-weight="bold" officeooo:rsid="0205f573" style:font-size-asian="15pt" style:font-weight-asian="bold" style:font-size-complex="15pt" style:font-weight-complex="bold"/>
    </style:style>
    <style:style style:name="T18" style:family="text">
      <style:text-properties fo:font-size="15pt" fo:font-weight="bold" officeooo:rsid="0245714a" style:font-size-asian="15pt" style:font-weight-asian="bold" style:font-size-complex="15pt" style:font-weight-complex="bold"/>
    </style:style>
    <style:style style:name="T19" style:family="text">
      <style:text-properties fo:font-size="15pt" fo:font-weight="bold" officeooo:rsid="0252ec64" style:font-size-asian="15pt" style:font-weight-asian="bold" style:font-size-complex="15pt" style:font-weight-complex="bold"/>
    </style:style>
    <style:style style:name="T20" style:family="text">
      <style:text-properties fo:font-size="15pt" fo:font-weight="bold" officeooo:rsid="025416f9" style:font-size-asian="15pt" style:font-weight-asian="bold" style:font-size-complex="15pt" style:font-weight-complex="bold"/>
    </style:style>
    <style:style style:name="T21" style:family="text">
      <style:text-properties fo:font-size="12pt" fo:font-weight="normal" officeooo:rsid="025d14b7" style:font-size-asian="10.5pt" style:font-weight-asian="normal" style:font-size-complex="12pt" style:font-weight-complex="normal"/>
    </style:style>
    <style:style style:name="T22" style:family="text">
      <style:text-properties fo:font-size="12pt" fo:font-weight="normal" officeooo:rsid="0285d36b" style:font-size-asian="10.5pt" style:font-weight-asian="normal" style:font-size-complex="12pt" style:font-weight-complex="normal"/>
    </style:style>
    <style:style style:name="T23" style:family="text">
      <style:text-properties fo:font-size="12pt" fo:font-weight="normal" officeooo:rsid="02a140d1" style:font-size-asian="10.5pt" style:font-weight-asian="normal" style:font-size-complex="12pt" style:font-weight-complex="normal"/>
    </style:style>
    <style:style style:name="T24" style:family="text">
      <style:text-properties fo:font-size="12pt" fo:font-style="italic" fo:font-weight="normal" officeooo:rsid="02a140d1" style:font-size-asian="10.5pt" style:font-weight-asian="normal" style:font-size-complex="12pt" style:font-weight-complex="normal"/>
    </style:style>
    <style:style style:name="T25" style:family="text">
      <style:text-properties officeooo:rsid="02507bfd"/>
    </style:style>
    <style:style style:name="T26" style:family="text">
      <style:text-properties officeooo:rsid="02525918"/>
    </style:style>
    <style:style style:name="T27" style:family="text">
      <style:text-properties style:font-name="Liberation Serif"/>
    </style:style>
    <style:style style:name="T28" style:family="text">
      <style:text-properties style:font-name="Liberation Serif" fo:font-size="14pt" officeooo:rsid="0254716c" style:font-size-asian="14pt" style:font-size-complex="14pt"/>
    </style:style>
    <style:style style:name="T29" style:family="text">
      <style:text-properties style:font-name="Liberation Serif" fo:font-size="14pt" officeooo:rsid="025c5f4c" style:font-size-asian="14pt" style:font-size-complex="14pt"/>
    </style:style>
    <style:style style:name="T30" style:family="text">
      <style:text-properties style:font-name="Liberation Serif" fo:font-size="14pt" fo:font-weight="normal" officeooo:rsid="0280a7b4" style:font-size-asian="14pt" style:font-weight-asian="normal" style:font-size-complex="14pt" style:font-weight-complex="normal"/>
    </style:style>
    <style:style style:name="T31" style:family="text">
      <style:text-properties style:font-name="Liberation Serif" fo:font-size="14pt" fo:font-weight="normal" officeooo:rsid="028e9f14" style:font-size-asian="14pt" style:font-weight-asian="normal" style:font-size-complex="14pt" style:font-weight-complex="normal"/>
    </style:style>
    <style:style style:name="T32" style:family="text">
      <style:text-properties style:font-name="Liberation Serif" officeooo:rsid="025c5f4c"/>
    </style:style>
    <style:style style:name="T33" style:family="text">
      <style:text-properties style:font-name="Liberation Serif" officeooo:rsid="025e57b8"/>
    </style:style>
    <style:style style:name="T34" style:family="text">
      <style:text-properties style:font-name="Liberation Serif" fo:font-size="12pt" fo:font-weight="normal" style:font-size-asian="12pt" style:font-weight-asian="normal" style:font-size-complex="12pt" style:font-weight-complex="normal"/>
    </style:style>
    <style:style style:name="T35" style:family="text">
      <style:text-properties style:font-name="Liberation Serif" fo:font-size="12pt" fo:font-weight="bold" style:font-size-asian="12pt" style:font-weight-asian="bold" style:font-size-complex="12pt" style:font-weight-complex="bold"/>
    </style:style>
    <style:style style:name="T36" style:family="text">
      <style:text-properties style:font-name="Liberation Serif" fo:font-size="12pt" style:font-size-asian="12pt" style:font-size-complex="12pt"/>
    </style:style>
    <style:style style:name="T37" style:family="text">
      <style:text-properties style:font-name="Liberation Serif" fo:font-size="12pt" officeooo:rsid="025e57b8" style:font-size-asian="12pt" style:font-size-complex="12pt"/>
    </style:style>
    <style:style style:name="T38" style:family="text">
      <style:text-properties style:font-name="Liberation Serif" fo:font-size="12pt" officeooo:rsid="0267a804" style:font-size-asian="12pt" style:font-size-complex="12pt"/>
    </style:style>
    <style:style style:name="T39" style:family="text">
      <style:text-properties style:font-name="Liberation Serif" fo:font-size="12pt" officeooo:rsid="026b2615" style:font-size-asian="12pt" style:font-size-complex="12pt"/>
    </style:style>
    <style:style style:name="T40" style:family="text">
      <style:text-properties style:font-name="Liberation Serif" fo:font-size="12pt" officeooo:rsid="0285d36b" style:font-size-asian="12pt" style:font-size-complex="12pt"/>
    </style:style>
    <style:style style:name="T41" style:family="text">
      <style:text-properties style:font-name="Liberation Serif" fo:font-size="12pt" officeooo:rsid="029ef615" style:font-size-asian="12pt" style:font-size-complex="12pt"/>
    </style:style>
    <style:style style:name="T42" style:family="text">
      <style:text-properties style:font-name="Liberation Serif" officeooo:rsid="0254716c"/>
    </style:style>
    <style:style style:name="T43" style:family="text">
      <style:text-properties style:font-name="Liberation Serif" fo:font-weight="bold" style:font-weight-asian="bold" style:font-weight-complex="bold"/>
    </style:style>
    <style:style style:name="T44" style:family="text">
      <style:text-properties style:font-name="Liberation Serif" fo:font-weight="normal" style:font-weight-asian="normal" style:font-weight-complex="normal"/>
    </style:style>
    <style:style style:name="T45" style:family="text">
      <style:text-properties style:font-name="Liberation Serif" fo:font-weight="normal" officeooo:rsid="0298fd27" style:font-weight-asian="normal" style:font-weight-complex="normal"/>
    </style:style>
    <style:style style:name="T46" style:family="text">
      <style:text-properties style:font-name="Liberation Serif" fo:font-weight="normal" officeooo:rsid="029a762f" style:font-weight-asian="normal" style:font-weight-complex="normal"/>
    </style:style>
    <style:style style:name="T47" style:family="text">
      <style:text-properties style:font-name="Liberation Serif" officeooo:rsid="0298fd27"/>
    </style:style>
    <style:style style:name="T48" style:family="text">
      <style:text-properties style:font-name="Liberation Serif" officeooo:rsid="029a762f"/>
    </style:style>
    <style:style style:name="T49" style:family="text">
      <style:text-properties officeooo:rsid="0259afc0"/>
    </style:style>
    <style:style style:name="T50" style:family="text">
      <style:text-properties officeooo:rsid="025c5f4c"/>
    </style:style>
    <style:style style:name="T51" style:family="text">
      <style:text-properties fo:font-style="italic"/>
    </style:style>
    <style:style style:name="T52" style:family="text">
      <style:text-properties fo:font-weight="bold" style:font-weight-asian="bold" style:font-weight-complex="bold"/>
    </style:style>
    <style:style style:name="T53" style:family="text">
      <style:text-properties officeooo:rsid="0260dfae"/>
    </style:style>
    <style:style style:name="T54" style:family="text">
      <style:text-properties officeooo:rsid="02677de0"/>
    </style:style>
    <style:style style:name="T55" style:family="text">
      <style:text-properties officeooo:rsid="026ac083"/>
    </style:style>
    <style:style style:name="T56" style:family="text">
      <style:text-properties officeooo:rsid="02815ec0"/>
    </style:style>
    <style:style style:name="T57" style:family="text">
      <style:text-properties officeooo:rsid="0284b13d"/>
    </style:style>
    <style:style style:name="T58" style:family="text">
      <style:text-properties officeooo:rsid="02874f4e"/>
    </style:style>
    <style:style style:name="T59" style:family="text">
      <style:text-properties officeooo:rsid="0288129e"/>
    </style:style>
    <style:style style:name="T60" style:family="text">
      <style:text-properties officeooo:rsid="029249e1"/>
    </style:style>
    <style:style style:name="T61" style:family="text">
      <style:text-properties officeooo:rsid="0297165f"/>
    </style:style>
    <style:style style:name="T62" style:family="text">
      <style:text-properties officeooo:rsid="02978c76"/>
    </style:style>
    <style:style style:name="T63" style:family="text">
      <style:text-properties officeooo:rsid="029bfdcc"/>
    </style:style>
    <style:style style:name="T64" style:family="text">
      <style:text-properties officeooo:rsid="029d2557"/>
    </style:style>
    <style:style style:name="T65" style:family="text">
      <style:text-properties officeooo:rsid="029df6fd"/>
    </style:style>
    <style:style style:name="T66" style:family="text">
      <style:text-properties officeooo:rsid="029ef615"/>
    </style:style>
    <style:style style:name="T67" style:family="text">
      <style:text-properties officeooo:rsid="02a03f8d"/>
    </style:style>
    <style:style style:name="T68" style:family="text">
      <style:text-properties officeooo:rsid="02a140d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2.676cm, 0cm, 0.131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355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draw:stroke="none" svg:stroke-width="0cm" draw:fill="bitmap" draw:fill-image-name="msFillBitmap_20_1" draw:fill-image-width="4.336cm" draw:fill-image-height="4.336cm" style:repeat="repeat" draw:fill-image-ref-point-x="0%" draw:fill-image-ref-point-y="0%" draw:fill-image-ref-point="top-left" draw:textarea-vertical-align="top" draw:auto-grow-height="false" fo:min-height="7.031cm" fo:min-width="11.061cm" fo:padding-top="0cm" fo:padding-bottom="0cm" fo:padding-left="0cm" fo:padding-right="0cm" fo:wrap-option="wrap" loext:decorative="false" fo:margin-left="0cm" fo:margin-right="0cm" fo:margin-top="0cm" fo:margin-bottom="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5">Reco</text:span><text:span text:style-name="T26">nocimiento</text:span><text:span text:style-name="T25"> activ</text:span><text:span text:style-name="T26">o</text:span>:</text:p>
      <text:p text:style-name="P1"/>
      <text:p text:style-name="P1"><draw:frame draw:style-name="fr3" draw:name="Imagen3" text:anchor-type="char" svg:x="0cm" svg:y="0.612cm" svg:width="17cm" svg:height="10.624cm" draw:z-index="42"><draw:image xlink:href="Pictures/1000000000000320000001F436E325CA.png" xlink:type="simple" xlink:show="embed" xlink:actuate="onLoad" draw:mime-type="image/png"/></draw:frame></text:p>
      <text:p text:style-name="P1"/>
      <text:p text:style-name="P114" loext:marker-style-name="T7"><text:span text:style-name="T8"/></text:p>
      <text:p text:style-name="P114" loext:marker-style-name="T7"><text:span text:style-name="T8"/></text:p>
      <text:p text:style-name="P115" loext:marker-style-name="T7"><text:span text:style-name="T7"/></text:p>
      <text:p text:style-name="P115" loext:marker-style-name="T7"><text:span text:style-name="T7"/></text:p>
      <text:p text:style-name="P115" loext:marker-style-name="T7"><text:span text:style-name="T7"/></text:p>
      <text:p text:style-name="P115" loext:marker-style-name="T7"><text:span text:style-name="T7"/></text:p>
      <text:p text:style-name="P115" loext:marker-style-name="T7"><text:span text:style-name="T7"/></text:p>
      <text:p text:style-name="P115" loext:marker-style-name="T7"><text:span text:style-name="T7"/></text:p>
      <text:p text:style-name="P115" loext:marker-style-name="T7"><text:span text:style-name="T7"/></text:p>
      <text:p text:style-name="P115" loext:marker-style-name="T7"><text:span text:style-name="T7"/></text:p>
      <text:p text:style-name="P115" loext:marker-style-name="T7"><text:span text:style-name="T7"/></text:p>
      <text:p text:style-name="P115" loext:marker-style-name="T7"><text:span text:style-name="T7"/></text:p>
      <text:p text:style-name="P115" loext:marker-style-name="T7"><text:span text:style-name="T7"/></text:p>
      <text:p text:style-name="P115" loext:marker-style-name="T7"><text:span text:style-name="T7"/></text:p>
      <text:p text:style-name="P115" loext:marker-style-name="T7"><text:span text:style-name="T7"/></text:p>
      <text:p text:style-name="P115" loext:marker-style-name="T7"><text:span text:style-name="T7"/></text:p>
      <text:p text:style-name="P115" loext:marker-style-name="T7"><draw:custom-shape text:anchor-type="char" draw:z-index="0" draw:name="Forma1" draw:style-name="gr1" draw:text-style-name="P149" svg:width="11.06cm" svg:height="7.03cm" svg:x="7.939cm" svg:y="7.323cm"><text:p text:style-name="Frame_20_contents" loext:marker-style-name="T2"><text:span text:style-name="T2">TRABAJO REALIZADO POR:</text:span></text:p><text:p text:style-name="P105" loext:marker-style-name="T2"/><text:p text:style-name="P107" loext:marker-style-name="T2"><text:span text:style-name="T2">Santiago Pérez Jiménez </text:span></text:p><text:p text:style-name="P107" loext:marker-style-name="T9"><text:span text:style-name="T2"><text:s/></text:span><text:span text:style-name="T3">2</text:span><text:span text:style-name="T2">º DE INGENIERÍA DE LA CIBERSEGURIDAD </text:span></text:p><text:p text:style-name="P105" loext:marker-style-name="T2"/><text:p text:style-name="P106" loext:marker-style-name="T2"/><text:p text:style-name="P108" loext:marker-style-name="T2"><text:span text:style-name="T2">UNIVERSIDAD EUROPEA</text:span></text:p><text:p text:style-name="P108" loext:marker-style-name="T2"><text:span text:style-name="T2">MADRID</text:span></text:p><text:p text:style-name="P108" loext:marker-style-name="T2"><text:span text:style-name="T2"><text:s text:c="2"/></text:span><text:span text:style-name="T6">17</text:span><text:span text:style-name="T2"> </text:span><text:span text:style-name="T5">ABRIL</text:span><text:span text:style-name="T2"> 202</text:span><text:span text:style-name="T4">6</text:span></text:p><text:p text:style-name="Default"><text:span text:style-name="T4"/></text:p><text:p text:style-name="P37"><text:s text:c="15"/><text:span text:style-name="T10">PROFESOR: </text:span><text:span text:style-name="T11"><text:s/></text:span><text:span text:style-name="T12">ALFREDO ROBLEDANO ABASOL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38" text:outline-level="1"><text:bookmark-start text:name="__RefHeading___Toc10972_2837051892 Copia 1 Copia 1"/><text:span text:style-name="T19">1</text:span><text:span text:style-name="T15">.</text:span><text:span text:style-name="T16"> </text:span><text:span text:style-name="T19">Resumen</text:span><text:span text:style-name="T17">:</text:span><text:bookmark-end text:name="__RefHeading___Toc10972_2837051892 Copia 1 Copia 1"/></text:h>
      <text:p text:style-name="P6">Esta práctica trata de realizar un reconocimiento activo, para ello se trata de implementar estímulos adicionales a los que se vieron en clase, con el objetivo de descubrir hosts de maneras diferentes.</text:p>
      <text:p text:style-name="P6">Eso es la primera parte, luego hay una segunda parte, que se tendrá que definir el funcionamiento por defecto de la herramienta “nmap” a la hora de descubrir puertos y estados.</text:p>
      <text:table-of-content text:style-name="Sect1" text:protected="true" text:name="Sumario1">
        <text:table-of-content-source text:outline-level="10">
          <text:index-title-template text:style-name="Contents_20_Heading">Índice</text:index-title-template>
          <text:table-of-content-entry-template text:outline-level="1" text:style-name="Frame_20_contents">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94">Índice</text:p>
          </text:index-title>
          <text:p text:style-name="P97"><text:a xlink:type="simple" xlink:href="#__RefHeading___Toc10972_2837051892%20Copia%201%20Copia%201" text:style-name="Index_20_Link" text:visited-style-name="Index_20_Link">1. Resumen:<text:tab/>2</text:a></text:p>
          <text:p text:style-name="P97"><text:a xlink:type="simple" xlink:href="#__RefHeading___Toc17072_1450507867" text:style-name="Index_20_Link" text:visited-style-name="Index_20_Link">2. Introducción:<text:tab/>5</text:a></text:p>
          <text:p text:style-name="P97"><text:a xlink:type="simple" xlink:href="#__RefHeading___Toc1996_2704774588%20Copia%201%20Copia%202" text:style-name="Index_20_Link" text:visited-style-name="Index_20_Link">3. Desarrollo:<text:tab/>6</text:a></text:p>
          <text:p text:style-name="P93"><text:a xlink:type="simple" xlink:href="#__RefHeading___Toc17074_1450507867" text:style-name="Index_20_Link" text:visited-style-name="Index_20_Link">Parte 1: Descubrimiento de hosts con scapy<text:tab/>6</text:a></text:p>
          <text:p text:style-name="P93"><text:a xlink:type="simple" xlink:href="#__RefHeading___Toc17076_1450507867" text:style-name="Index_20_Link" text:visited-style-name="Index_20_Link">Parte 2: Comportamiento por defecto nmap y port status<text:tab/>16</text:a></text:p>
          <text:p text:style-name="P97"><text:a xlink:type="simple" xlink:href="#__RefHeading___Toc1996_2704774588%20Copia%201%20Copia%202%20Copia%201" text:style-name="Index_20_Link" text:visited-style-name="Index_20_Link">4. Resultados:<text:tab/>24</text:a></text:p>
          <text:p text:style-name="P93"><text:a xlink:type="simple" xlink:href="#__RefHeading___Toc1695_1505471852" text:style-name="Index_20_Link" text:visited-style-name="Index_20_Link">Parte 1 descubrimiento de hosts con scapy:<text:tab/>24</text:a></text:p>
          <text:p text:style-name="P93"><text:a xlink:type="simple" xlink:href="#__RefHeading___Toc1697_1505471852" text:style-name="Index_20_Link" text:visited-style-name="Index_20_Link">Parte 2: comportamiento por defecto de nmap:<text:tab/>25</text:a></text:p>
          <text:p text:style-name="P97"><text:a xlink:type="simple" xlink:href="#__RefHeading___Toc1996_2704774588%20Copia%201%20Copia%202%20Copia%201%20Copia%201" text:style-name="Index_20_Link" text:visited-style-name="Index_20_Link">5. Conclusiones:<text:tab/>27</text:a></text:p>
          <text:p text:style-name="P97"><text:a xlink:type="simple" xlink:href="#__RefHeading___Toc1996_2704774588%20Copia%201%20Copia%202%20Copia%201%20Copia%202" text:style-name="Index_20_Link" text:visited-style-name="Index_20_Link">6. Bibliografía:<text:tab/>28</text:a></text:p>
        </text:index-body>
      </text:table-of-content>
      <text:p text:style-name="P48"><text:span text:style-name="T1"/></text:p>
      <text:p text:style-name="P116" loext:marker-style-name="T1"><text:span text:style-name="T1"/></text:p>
      <text:p text:style-name="P117" loext:marker-style-name="T1"><text:span text:style-name="T17"/></text:p>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rotected="true">
            <text:p text:style-name="P95">Índice de figuras</text:p>
          </text:index-title>
          <text:p text:style-name="P96"><text:a xlink:type="simple" xlink:href="#Figura!0%7Csequence" text:style-name="Index_20_Link" text:visited-style-name="Index_20_Link">Figura 1: Código descubrimiento de hosts 1<text:tab/>7</text:a></text:p>
          <text:p text:style-name="P96"><text:a xlink:type="simple" xlink:href="#Figura!1%7Csequence" text:style-name="Index_20_Link" text:visited-style-name="Index_20_Link">Figura 2: Código descubrimiento de host 2<text:tab/>8</text:a></text:p>
          <text:p text:style-name="P96"><text:a xlink:type="simple" xlink:href="#Figura!2%7Csequence" text:style-name="Index_20_Link" text:visited-style-name="Index_20_Link">Figura 3: Código descubrimiento de host 3<text:tab/>9</text:a></text:p>
          <text:p text:style-name="P96"><text:a xlink:type="simple" xlink:href="#Figura!3%7Csequence" text:style-name="Index_20_Link" text:visited-style-name="Index_20_Link">Figura 4: Docker compose 1<text:tab/>10</text:a></text:p>
          <text:p text:style-name="P96"><text:a xlink:type="simple" xlink:href="#Figura!4%7Csequence" text:style-name="Index_20_Link" text:visited-style-name="Index_20_Link">Figura 5: Docker compose 2<text:tab/>11</text:a></text:p>
          <text:p text:style-name="P96"><text:a xlink:type="simple" xlink:href="#Figura!5%7Csequence" text:style-name="Index_20_Link" text:visited-style-name="Index_20_Link">Figura 6: Docker compose 3<text:tab/>12</text:a></text:p>
          <text:p text:style-name="P96"><text:a xlink:type="simple" xlink:href="#Figura!6%7Csequence" text:style-name="Index_20_Link" text:visited-style-name="Index_20_Link">Figura 7: Ejecución docker compose 1<text:tab/>13</text:a></text:p>
          <text:p text:style-name="P96"><text:a xlink:type="simple" xlink:href="#Figura!7%7Csequence" text:style-name="Index_20_Link" text:visited-style-name="Index_20_Link">Figura 8: Ejecución docker compose 2<text:tab/>13</text:a></text:p>
          <text:p text:style-name="P96"><text:a xlink:type="simple" xlink:href="#Figura!8%7Csequence" text:style-name="Index_20_Link" text:visited-style-name="Index_20_Link">Figura 9: Interfaz<text:tab/>13</text:a></text:p>
          <text:p text:style-name="P96"><text:a xlink:type="simple" xlink:href="#Figura!9%7Csequence" text:style-name="Index_20_Link" text:visited-style-name="Index_20_Link">Figura 10: Output del código<text:tab/>14</text:a></text:p>
          <text:p text:style-name="P96"><text:a xlink:type="simple" xlink:href="#Figura!10%7Csequence" text:style-name="Index_20_Link" text:visited-style-name="Index_20_Link">Figura 11: Prueba Wireshark ARP 1<text:tab/>14</text:a></text:p>
          <text:p text:style-name="P96"><text:a xlink:type="simple" xlink:href="#Figura!11%7Csequence" text:style-name="Index_20_Link" text:visited-style-name="Index_20_Link">Figura 12: Prueba Wireshark ICMP, TCP y UDP 2<text:tab/>15</text:a></text:p>
          <text:p text:style-name="P96"><text:a xlink:type="simple" xlink:href="#Figura!12%7Csequence" text:style-name="Index_20_Link" text:visited-style-name="Index_20_Link">Figura 13: nmap localhost resultado<text:tab/>18</text:a></text:p>
          <text:p text:style-name="P96"><text:a xlink:type="simple" xlink:href="#Figura!13%7Csequence" text:style-name="Index_20_Link" text:visited-style-name="Index_20_Link">Figura 14: Conteo de paquetes enviados<text:tab/>19</text:a></text:p>
          <text:p text:style-name="P96"><text:a xlink:type="simple" xlink:href="#Figura!14%7Csequence" text:style-name="Index_20_Link" text:visited-style-name="Index_20_Link">Figura 15: Docker compose 4<text:tab/>20</text:a></text:p>
          <text:p text:style-name="P96"><text:a xlink:type="simple" xlink:href="#Figura!15%7Csequence" text:style-name="Index_20_Link" text:visited-style-name="Index_20_Link">Figura 16: Levantar docker compose<text:tab/>20</text:a></text:p>
          <text:p text:style-name="P96"><text:a xlink:type="simple" xlink:href="#Figura!16%7Csequence" text:style-name="Index_20_Link" text:visited-style-name="Index_20_Link">Figura 17: Resultado de análisis<text:tab/>21</text:a></text:p>
          <text:p text:style-name="P96"><text:a xlink:type="simple" xlink:href="#Figura!17%7Csequence" text:style-name="Index_20_Link" text:visited-style-name="Index_20_Link">Figura 18: Interfaz Wireshark<text:tab/>22</text:a></text:p>
          <text:p text:style-name="P96"><text:a xlink:type="simple" xlink:href="#Figura!18%7Csequence" text:style-name="Index_20_Link" text:visited-style-name="Index_20_Link">Figura 19: Análisis de puertos concreto<text:tab/>23</text:a></text:p>
          <text:p text:style-name="P96"><text:a xlink:type="simple" xlink:href="#Figura!19%7Csequence" text:style-name="Index_20_Link" text:visited-style-name="Index_20_Link">Figura 20: Resultado de Wireshark<text:tab/>23</text:a></text:p>
        </text:index-body>
      </text:illustration-index>
      <text:h text:style-name="P42" text:outline-level="1"><text:span text:style-name="T19"/></text:h>
      <text:h text:style-name="P43" text:outline-level="1"><text:bookmark-start text:name="__RefHeading___Toc17072_1450507867"/><text:span text:style-name="T19">2. Introducción</text:span><text:span text:style-name="T17">:</text:span><text:bookmark-end text:name="__RefHeading___Toc17072_1450507867"/></text:h>
      <text:p text:style-name="P39"><text:bookmark-start text:name="__RefHeading___Toc10972_2837051892 Copia 2"/><text:span text:style-name="T49">El trabajo de hoy se realizará el reconocimiento activo en este caso de descubrimiento de hosts, puertos y sus estados, para ello se realizará un script y una investigación </text:span>exhaustiva <text:span text:style-name="T49">sobre el funcionamiento de nmap.</text:span><text:bookmark-end text:name="__RefHeading___Toc10972_2837051892 Copia 2"/></text:p>
      <text:p text:style-name="P49">Este trabajo consta de dos partes:</text:p>
      <text:list text:style-name="L1">
        <text:list-item>
          <text:p text:style-name="P118">Descubrimiento de hosts con scapy:</text:p>
        </text:list-item>
      </text:list>
      <text:p text:style-name="P50">Nos piden que realicemos un script en el que creemos una función en python que nos permita realizar host discovery usando scapy con los protocolos UDP, TCP (ACK), ICMP (timestamp) y utilizarlo para detectar hosts activos.</text:p>
      <text:p text:style-name="P50"/>
      <text:list text:continue-numbering="true" text:style-name="L1">
        <text:list-item>
          <text:p text:style-name="P118">Comportamiento por defecto nmap y port status:</text:p>
        </text:list-item>
      </text:list>
      <text:p text:style-name="P51">Hay que investigar a fondo la herramienta, ejecutando por defecto nmap activa una serie de comportamientos preconfigurados que el auditor debe conocer a fondo, por lo tanto, hay que hacer unas breves definiciones de conceptos, identificar comportamientos por defectos de nmap y justificar dichos hallazgos con algún packet sniffer.</text:p>
      <text:p text:style-name="P51"/>
      <text:p text:style-name="P52">Entonces el objetivo final es implementar dichos estímulos adicionales que se vieron en clase de manera práctica para el descubrimiento de hosts. Además, definiendo el funcionamiento por defecto de la herramienta nmap en el descubrimiento de puertos y su estado.</text:p>
      <text:h text:style-name="P4" text:outline-level="1"><text:bookmark-start text:name="__RefHeading___Toc1996_2704774588 Copia 1 Copia 2"/><text:span text:style-name="T20">3. Desarrollo</text:span><text:span text:style-name="T13">:</text:span><text:bookmark-end text:name="__RefHeading___Toc1996_2704774588 Copia 1 Copia 2"/></text:h>
      <text:h text:style-name="P109" text:outline-level="2"><text:bookmark-start text:name="__RefHeading___Toc17074_1450507867"/><text:span text:style-name="T28">Parte 1: </text:span><text:span text:style-name="T29">Descubrimiento de hosts con scapy</text:span><text:bookmark-end text:name="__RefHeading___Toc17074_1450507867"/></text:h>
      <text:p text:style-name="P16"><text:span text:style-name="T42"/></text:p>
      <text:p text:style-name="P24"><text:span text:style-name="T42">E</text:span><text:span text:style-name="T27">l descubrimiento de hosts es fundamental en el proceso de auditoría activa de una red. El uso de estímulos y observar las respuestas permite a un atacante identificar dispositivos que exponen servicios para poder explotarlo después. </text:span></text:p>
      <text:p text:style-name="P24"><text:span text:style-name="T27">Por ello, me piden crear una función en </text:span><text:span text:style-name="T47">P</text:span><text:span text:style-name="T27">ython que permite realizar el host discovery y tengo que utilizar scapy, me piden 3 protocolos UDP, TCP (ACK), ICMP (timestamp) y utilizarlo para detecta</text:span><text:span text:style-name="T47">r</text:span><text:span text:style-name="T27"> hosts activos.</text:span></text:p>
      <text:p text:style-name="P119"><text:line-break/>Para ello tengo que realizar unas tareas:</text:p>
      <text:p text:style-name="P25"><text:span text:style-name="T27"/></text:p>
      <text:list text:style-name="L2">
        <text:list-item>
          <text:p text:style-name="P141"><text:span text:style-name="T27">Crear una función “</text:span><text:span text:style-name="T43">craft_discovery_pkts”</text:span><text:span text:style-name="T44">, teniendo de argumentos:</text:span></text:p>
          <text:list>
            <text:list-item>
              <text:p text:style-name="P135">Lista de 3 posibles protocolos en formato string o string que represente el protocolo a utilizar.</text:p>
            </text:list-item>
            <text:list-item>
              <text:p text:style-name="P141"><text:span text:style-name="T44">Rango de Ips en formato scapy o string que represente la </text:span><text:span text:style-name="T45">IP</text:span><text:span text:style-name="T44"> a enviar el paquete.</text:span></text:p>
            </text:list-item>
            <text:list-item>
              <text:p text:style-name="P135">Diccionario con claves de los protocolos y valores del número de paquetes a construir y si no se pasa solo se montará un paquete de cada tipo que sea exigido.</text:p>
            </text:list-item>
            <text:list-item>
              <text:p text:style-name="P135">Puerto a utilizar en TCP y UDP, se usará el puerto 80 de no pasarse.</text:p>
            </text:list-item>
            <text:list-item>
              <text:p text:style-name="P141"><text:span text:style-name="T44">La función tiene que enviar al menos uno de los 3 protocolos, a un host activo y a otro que no tenga una </text:span><text:span text:style-name="T45">IP</text:span><text:span text:style-name="T44"> con host que no lo tenga activa.</text:span></text:p>
            </text:list-item>
            <text:list-item>
              <text:p text:style-name="P141"><text:span text:style-name="T44">Se hará un scripto o jupyter notebook, que use la función mencionada junto a “sr” </text:span><text:span text:style-name="T45">u</text:span><text:span text:style-name="T44"> otra función de scapy, que salga como “output” las Ips activas.</text:span></text:p>
            </text:list-item>
          </text:list>
        </text:list-item>
      </text:list>
      <text:p text:style-name="P15"><text:span text:style-name="T42">C</text:span><text:span text:style-name="T27">ódigo:</text:span></text:p>
      <text:p text:style-name="P120">La primera parte del código se basa en el código con los argumentos obligatorios que se asignaron poniendo de opcional el del puerto 80 (esto es debido a que los protocolos TCP y UDP es necesario especificar un puerto de destino), luego si los protocolos son “string” lo modifico a lista.</text:p>
      <text:p text:style-name="P120"><text:span text:style-name="T68">1. </text:span>(Ivanov &amp; Ivanov, n.d.) </text:p>
      <text:p text:style-name="P26"><draw:frame draw:style-name="fr1" draw:name="Marco2" text:anchor-type="char" svg:x="0.123cm" svg:y="0.296cm" svg:width="17cm" draw:z-index="22"><draw:text-box fo:min-height="10.788cm"><text:p text:style-name="Figure"><draw:frame draw:style-name="fr4" draw:name="Imagen10" text:anchor-type="paragraph" svg:width="17cm" style:rel-width="100%" svg:height="10.788cm" style:rel-height="scale" draw:z-index="23"><draw:image xlink:href="Pictures/10000000000003FA00000286A0F43F97.png" xlink:type="simple" xlink:show="embed" xlink:actuate="onLoad" draw:mime-type="image/png"/></draw:frame>Figura <text:sequence text:ref-name="refFigure0" text:name="Figure" text:formula="ooow:Figure+1" style:num-format="1">1</text:sequence>: Código descubrimiento de hosts 1</text:p></draw:text-box></draw:frame><text:span text:style-name="T27"/></text:p>
      <text:p text:style-name="P26"><text:span text:style-name="T27"/></text:p>
      <text:p text:style-name="P36"><text:span text:style-name="T27"/></text:p>
      <text:p text:style-name="P14"><text:span text:style-name="T27"/></text:p>
      <text:p text:style-name="P14"><text:span text:style-name="T27"/></text:p>
      <text:p text:style-name="P14"><text:span text:style-name="T27"/></text:p>
      <text:p text:style-name="P14"><text:span text:style-name="T27"/></text:p>
      <text:p text:style-name="P14"><text:span text:style-name="T27"/></text:p>
      <text:p text:style-name="P14"><text:span text:style-name="T27"/></text:p>
      <text:p text:style-name="P14"><text:span text:style-name="T27"/></text:p>
      <text:p text:style-name="P14"><text:span text:style-name="T27"/></text:p>
      <text:p text:style-name="P14"><text:span text:style-name="T27"/></text:p>
      <text:p text:style-name="P143"><text:soft-page-break/><text:span text:style-name="T27"/></text:p>
      <text:p text:style-name="P121">El código se basa en dos partes, la primera es la construcción de los paquetes de ICMP, UDP y TCP.</text:p>
      <text:p text:style-name="P121">Luego la condición de especificar el número de paquetes y si no se especifica solo se envía uno.</text:p>
      <text:p text:style-name="P121">ICMP, UDP y TCP, cumplen con las condiciones haciendo que TCP actué mediante ACK, mediante la flag “A”.</text:p>
      <text:p text:style-name="P121">En la construcción del paquete se hace lo siguiente:</text:p>
      <text:p text:style-name="P28"><text:span text:style-name="T27"/></text:p>
      <text:list text:style-name="L3">
        <text:list-item>
          <text:p text:style-name="P142"><text:span text:style-name="T27">Se ve si existe dicho protocolo, se repite el proceso dependiendo del número de paquetes a enviar, dentro construyo la capa 3, que es la IP de destino y la capa 4 la uso para cada protocolo con lo exigido, luego se construye el paquete con la capa 3 y 4, y guardo el paqu</text:span><text:span text:style-name="T48">e</text:span><text:span text:style-name="T27">te.</text:span></text:p>
        </text:list-item>
      </text:list>
      <text:p text:style-name="P14"><text:span text:style-name="T27"/></text:p>
      <text:p text:style-name="P14"><draw:frame draw:style-name="fr1" draw:name="Marco3" text:anchor-type="char" svg:x="2.616cm" svg:y="-0.252cm" svg:width="11.769cm" draw:z-index="24"><draw:text-box fo:min-height="11.628cm"><text:p text:style-name="Figure"><draw:frame draw:style-name="fr7" draw:name="Imagen11" text:anchor-type="paragraph" svg:x="0cm" svg:y="-0.455cm" svg:width="11.769cm" style:rel-width="100%" svg:height="11.628cm" style:rel-height="scale" draw:z-index="25"><draw:image xlink:href="Pictures/100000000000038E000003CCC0C16BA2.png" xlink:type="simple" xlink:show="embed" xlink:actuate="onLoad" draw:mime-type="image/png"/></draw:frame>Figura <text:sequence text:ref-name="refFigure1" text:name="Figure" text:formula="ooow:Figure+1" style:num-format="1">2</text:sequence>: Código descubrimiento de host 2</text:p></draw:text-box></draw:frame><text:span text:style-name="T27"/></text:p>
      <text:p text:style-name="P14"><text:span text:style-name="T27"/></text:p>
      <text:p text:style-name="P14"><text:span text:style-name="T27"/></text:p>
      <text:p text:style-name="P14"><text:span text:style-name="T27"/></text:p>
      <text:p text:style-name="P14"><text:span text:style-name="T27"/></text:p>
      <text:p text:style-name="P14"><text:span text:style-name="T27"/></text:p>
      <text:p text:style-name="P14"><text:span text:style-name="T27"/></text:p>
      <text:p text:style-name="P14"><text:span text:style-name="T27"/></text:p>
      <text:p text:style-name="P14"><text:span text:style-name="T27"/></text:p>
      <text:p text:style-name="P14"><text:span text:style-name="T27"/></text:p>
      <text:p text:style-name="P14"><text:span text:style-name="T27"/></text:p>
      <text:p text:style-name="P14"><text:span text:style-name="T27"/></text:p>
      <text:p text:style-name="P14"><text:span text:style-name="T27"/></text:p>
      <text:p text:style-name="P14"><text:span text:style-name="T27"/></text:p>
      <text:p text:style-name="P14"><text:span text:style-name="T27"/></text:p>
      <text:p text:style-name="P14"><text:span text:style-name="T27"/></text:p>
      <text:p text:style-name="P17"><text:span text:style-name="T27"/></text:p>
      <text:p text:style-name="P27"><text:span text:style-name="T27">Est</text:span><text:span text:style-name="T48">a</text:span><text:span text:style-name="T27"> es la segunda parte, en ella se define los protocolos, los “targets” a los que se escanea las IPs, y se dice c</text:span><text:span text:style-name="T48">ú</text:span><text:span text:style-name="T27">al es la red local.</text:span></text:p>
      <text:p text:style-name="P122">La red local, se supone que la se yo, por eso establezco ese rango.</text:p>
      <text:p text:style-name="P122">Para ambas varias se puede poner o una IP, una serie de IPs en lista o un rango de IP.</text:p>
      <text:p text:style-name="P122">La separación de entre ARP y los otros 3 protocolos es muy sencillo de explicar, normalmente no se podrían utilizar porque trabajan en otras capas, si se imagina enviando a una red local los otros 3 protocolos se haría sin problema, pero antes el sistema normalmente hará ARP internamente para conocer la MAC de destino.</text:p>
      <text:p text:style-name="P123">Es más sencillo de lo que parece, ARP trabaja en la capa 2, lo que hace es obtener la MAC de una IP en la LAN, ICMP trabaja con la capa 3, lo que hace son mensajes de control o hace diagnósticos y luego está TCP y UDP que trabajan en la capa 4 que lo que hacen es la comunicación entre aplicaciones. </text:p>
      <text:p text:style-name="P140"><text:span text:style-name="T68">2</text:span>.(Peiro, 2026)</text:p>
      <text:p text:style-name="P124">Entonces, ¿Qué pasa si por un casual en “red_local” pongo una IP o rango de IP que no está en la red local? Muy sencillo la propia consola nos haría una alerta de que localiza la MAC y entonces puede funcionar, pero puede incluso llegar a fallar.</text:p>
      <text:p text:style-name="P124">Luego el código se construye de un bucle para analizar todas las IP de una en una, lo que hacemos es una condición para determinar si pertenece a la “red_local” o no.</text:p>
      <text:p text:style-name="P124">Si pertenece a ARP, lo que hace es construye el paquete compuesto por el destino del broadcast Ethernet, básicamente lo que hace es enviar a todos los equipos de la red local, pregunta por una IP concreta (ARP(pdst=ip)) y luego scapy envía ese frame.</text:p>
      <text:p text:style-name="P29"><text:span text:style-name="T27">Si pertenece a alguno de los otros 3 protocolos, lo que hace es generar los paquetes junto </text:span><text:span text:style-name="T48">a</text:span><text:span text:style-name="T27"> su paquete IP y luego lo envía a la IP de destino.</text:span></text:p>
      <text:p text:style-name="P29"><draw:frame draw:style-name="fr1" draw:name="Marco4" text:anchor-type="char" svg:x="2.277cm" svg:y="0.021cm" svg:width="12.139cm" draw:z-index="26"><draw:text-box fo:min-height="8.569cm"><text:p text:style-name="Figure"><draw:frame draw:style-name="fr4" draw:name="Imagen17" text:anchor-type="paragraph" svg:width="12.139cm" style:rel-width="100%" svg:height="8.569cm" style:rel-height="scale" draw:z-index="27"><draw:image xlink:href="Pictures/10000000000004BB00000357C1A79A8C.png" xlink:type="simple" xlink:show="embed" xlink:actuate="onLoad" draw:mime-type="image/png"/></draw:frame>Figura <text:sequence text:ref-name="refFigure2" text:name="Figure" text:formula="ooow:Figure+1" style:num-format="1">3</text:sequence>: Código descubrimiento de host <text:span text:style-name="T61">3</text:span></text:p></draw:text-box></draw:frame><text:span text:style-name="T27"/></text:p>
      <text:p text:style-name="P46"><text:span text:style-name="T40"/></text:p>
      <text:p text:style-name="P14"><text:span text:style-name="T27"/></text:p>
      <text:p text:style-name="P14"><text:span text:style-name="T27"/></text:p>
      <text:p text:style-name="P30"><text:span text:style-name="T27"/></text:p>
      <text:p text:style-name="P125">Utilizaré dos docker compose de prueba, uno de una red local y otro en el que se distingue dos redes distintas, para poder probar la teoría del ARP y de los otros 3 protocolos.</text:p>
      <text:p text:style-name="P31"><text:span text:style-name="T27">Es importante destacar que aunque use el otro docker compose con dos redes distintas está sigue siendo “red local” por estar con docker, pero a</text:span><text:span text:style-name="T48">u</text:span><text:span text:style-name="T27">n así la prueba debería de salir correctamente, pero puede que se cuele el protocolo de ARP.</text:span></text:p>
      <text:p text:style-name="P67">Docker compose que usaré de prueba <text:span text:style-name="T58">para el protocolo ARP:</text:span></text:p>
      <text:p text:style-name="P18"><draw:frame draw:style-name="fr1" draw:name="Marco5" text:anchor-type="char" svg:x="4.602cm" svg:y="0.095cm" svg:width="7.648cm" draw:z-index="18"><draw:text-box fo:min-height="16.725cm"><text:p text:style-name="Figure"><draw:frame draw:style-name="fr4" draw:name="Imagen12" text:anchor-type="paragraph" svg:width="7.648cm" style:rel-width="100%" svg:height="16.725cm" style:rel-height="scale" draw:z-index="19"><draw:image xlink:href="Pictures/10000001000001660000030F33DC2017.png" xlink:type="simple" xlink:show="embed" xlink:actuate="onLoad" draw:mime-type="image/png"/></draw:frame>Figura <text:sequence text:ref-name="refFigure3" text:name="Figure" text:formula="ooow:Figure+1" style:num-format="1">4</text:sequence>: Docker compose 1</text:p></draw:text-box></draw:frame><text:span text:style-name="T27"/></text:p>
      <text:p text:style-name="P18"><text:span text:style-name="T27"/></text:p>
      <text:p text:style-name="P18"><text:span text:style-name="T27"/></text:p>
      <text:p text:style-name="P18"><text:span text:style-name="T27"/></text:p>
      <text:p text:style-name="P18"><text:span text:style-name="T27"/></text:p>
      <text:p text:style-name="P18"><text:span text:style-name="T27"/></text:p>
      <text:p text:style-name="P18"><text:span text:style-name="T27"/></text:p>
      <text:p text:style-name="P18"><text:span text:style-name="T27"/></text:p>
      <text:p text:style-name="P18"><text:span text:style-name="T27"/></text:p>
      <text:p text:style-name="P18"><text:span text:style-name="T27"/></text:p>
      <text:p text:style-name="P18"><text:span text:style-name="T27"/></text:p>
      <text:p text:style-name="P18"><text:span text:style-name="T27"/></text:p>
      <text:p text:style-name="P18"><text:span text:style-name="T27"/></text:p>
      <text:p text:style-name="P18"><text:span text:style-name="T27"/></text:p>
      <text:p text:style-name="P18"><text:span text:style-name="T27"/></text:p>
      <text:p text:style-name="P18"><text:span text:style-name="T27"/></text:p>
      <text:p text:style-name="P18"><text:span text:style-name="T27"/></text:p>
      <text:p text:style-name="P18"><text:span text:style-name="T27"/></text:p>
      <text:p text:style-name="P18"><text:span text:style-name="T27"/></text:p>
      <text:p text:style-name="P18"><text:span text:style-name="T27"/></text:p>
      <text:p text:style-name="P18"><text:span text:style-name="T27"/></text:p>
      <text:p text:style-name="P18"><text:span text:style-name="T27"/></text:p>
      <text:p text:style-name="P74"/>
      <text:p text:style-name="P74">Se compone de 3 servicios, SSH, FTP <text:s/>y HTTP.</text:p>
      <text:p text:style-name="P19"><text:span text:style-name="T27"/></text:p>
      <text:p text:style-name="P71">El otro docker compose que utilizaré <text:span text:style-name="T59">para probar los protocolos TCP, UDP, ICMP:</text:span></text:p>
      <text:p text:style-name="P21"><draw:frame draw:style-name="fr1" draw:name="Marco6" text:anchor-type="char" svg:x="1.596cm" svg:y="0.231cm" svg:width="13.511cm" draw:z-index="28"><draw:text-box fo:min-height="18.098cm"><text:p text:style-name="Figure"><draw:frame draw:style-name="fr4" draw:name="Imagen18" text:anchor-type="paragraph" svg:width="13.511cm" style:rel-width="100%" svg:height="18.098cm" style:rel-height="scale" draw:z-index="29"><draw:image xlink:href="Pictures/10000000000002FE00000402EDC4C195.png" xlink:type="simple" xlink:show="embed" xlink:actuate="onLoad" draw:mime-type="image/png"/></draw:frame>Figura <text:sequence text:ref-name="refFigure4" text:name="Figure" text:formula="ooow:Figure+1" style:num-format="1">5</text:sequence>: Docker compose 2</text:p></draw:text-box></draw:frame><text:span text:style-name="T27"/></text:p>
      <text:p text:style-name="P32"><text:span text:style-name="T27">En este caso se divide en 2 máquinas con “Alpine” y de 3 routers.</text:span></text:p>
      <text:p text:style-name="P19"><text:span text:style-name="T27"/></text:p>
      <text:p text:style-name="P65"><draw:frame draw:style-name="fr2" draw:name="Marco7" text:anchor-type="char" svg:width="12.409cm" draw:z-index="30"><draw:text-box fo:min-height="10.425cm"><text:p text:style-name="Figure"><draw:frame draw:style-name="fr4" draw:name="Imagen19" text:anchor-type="paragraph" svg:width="12.409cm" style:rel-width="100%" svg:height="10.425cm" style:rel-height="scale" draw:z-index="31"><draw:image xlink:href="Pictures/10000001000003220000024F2E1AC767.png" xlink:type="simple" xlink:show="embed" xlink:actuate="onLoad" draw:mime-type="image/png"/></draw:frame>Figura <text:sequence text:ref-name="refFigure5" text:name="Figure" text:formula="ooow:Figure+1" style:num-format="1">6</text:sequence>: Docker compose 3</text:p></draw:text-box></draw:frame></text:p>
      <text:p text:style-name="P66">Prueba de ejecución:</text:p>
      <text:p text:style-name="P75">Lo primero que hago es levantar ambos docker compose:</text:p>
      <text:p text:style-name="P18"><draw:frame draw:style-name="fr1" draw:name="Marco8" text:anchor-type="char" svg:x="1.977cm" svg:y="0.245cm" svg:width="13.354cm" draw:z-index="20"><draw:text-box fo:min-height="2.955cm"><text:p text:style-name="Figure"><draw:frame draw:style-name="fr4" draw:name="Imagen13" text:anchor-type="paragraph" svg:width="13.354cm" style:rel-width="100%" svg:height="2.955cm" style:rel-height="scale" draw:z-index="21"><draw:image xlink:href="Pictures/100000010000026200000093C0558763.png" xlink:type="simple" xlink:show="embed" xlink:actuate="onLoad" draw:mime-type="image/png"/></draw:frame>Figura <text:sequence text:ref-name="refFigure6" text:name="Figure" text:formula="ooow:Figure+1" style:num-format="1">7</text:sequence>: Ejecución docker compose 1</text:p></draw:text-box></draw:frame><text:span text:style-name="T27"/></text:p>
      <text:p text:style-name="P18"><text:span text:style-name="T27"/></text:p>
      <text:p text:style-name="P18"><draw:frame draw:style-name="fr1" draw:name="Marco9" text:anchor-type="char" svg:x="3.732cm" svg:y="-0.157cm" svg:width="9.527cm" draw:z-index="32"><draw:text-box fo:min-height="3.413cm"><text:p text:style-name="Figure"><draw:frame draw:style-name="fr7" draw:name="Imagen14" text:anchor-type="paragraph" svg:x="0cm" svg:y="-0.093cm" svg:width="9.527cm" style:rel-width="100%" svg:height="3.413cm" style:rel-height="scale" draw:z-index="33"><draw:image xlink:href="Pictures/100000010000016800000081ED287C3B.png" xlink:type="simple" xlink:show="embed" xlink:actuate="onLoad" draw:mime-type="image/png"/></draw:frame>Figura <text:sequence text:ref-name="refFigure7" text:name="Figure" text:formula="ooow:Figure+1" style:num-format="1">8</text:sequence>: Ejecución docker compose 2</text:p></draw:text-box></draw:frame><text:span text:style-name="T27"/></text:p>
      <text:p text:style-name="P18"><text:span text:style-name="T27"/></text:p>
      <text:p text:style-name="P18"><text:span text:style-name="T27"/></text:p>
      <text:p text:style-name="P18"><text:span text:style-name="T27"/></text:p>
      <text:p text:style-name="P18"><text:span text:style-name="T27"/></text:p>
      <text:p text:style-name="P18"><text:span text:style-name="T27"/></text:p>
      <text:p text:style-name="P33"><draw:frame draw:style-name="fr1" draw:name="Marco10" text:anchor-type="char" svg:x="0.025cm" svg:y="2.279cm" svg:width="16.679cm" draw:z-index="34"><draw:text-box fo:min-height="2.028cm"><text:p text:style-name="Figure"><draw:frame draw:style-name="fr6" draw:name="Imagen15" text:anchor-type="paragraph" svg:width="16.679cm" style:rel-width="100%" svg:height="2.028cm" style:rel-height="scale" draw:z-index="35"><draw:image xlink:href="Pictures/10000000000004280000007F61BD37C6.png" xlink:type="simple" xlink:show="embed" xlink:actuate="onLoad" draw:mime-type="image/png"/></draw:frame>Figura <text:sequence text:ref-name="refFigure8" text:name="Figure" text:formula="ooow:Figure+1" style:num-format="1">9</text:sequence>: Interfaz </text:p></draw:text-box></draw:frame><text:span text:style-name="T27">Luego verifico c</text:span><text:span text:style-name="T48">ú</text:span><text:span text:style-name="T27">al es la interfaz para poder ponerlo en el script y poder detectar con el ARP, el del otro docker compose, lo miro directamente en Wireshark que utilizaré para que efectivamente me hace lo que estoy buscando.</text:span></text:p>
      <text:p text:style-name="P70"/>
      <text:p text:style-name="P77">Primero haré la prueba con el ARP, como se ve, funciona correctamente me saca las IPs de ambos protocolos, a primera vista parece que no sabemos si funciona y por ello utilizamos Wireshark para verificar que hace lo que queremos:</text:p>
      <text:p text:style-name="P73"><draw:frame draw:style-name="fr1" draw:name="Marco11" text:anchor-type="char" svg:x="3.858cm" svg:y="0.169cm" svg:width="8.17cm" draw:z-index="36"><draw:text-box fo:min-height="12.779cm"><text:p text:style-name="Figure"><draw:frame draw:style-name="fr4" draw:name="Imagen16" text:anchor-type="paragraph" svg:width="8.17cm" style:rel-width="100%" svg:height="12.779cm" style:rel-height="scale" draw:z-index="37"><draw:image xlink:href="Pictures/1000000000000240000003859FD9B43E.png" xlink:type="simple" xlink:show="embed" xlink:actuate="onLoad" draw:mime-type="image/png"/></draw:frame>Figura <text:sequence text:ref-name="refFigure9" text:name="Figure" text:formula="ooow:Figure+1" style:num-format="1">10</text:sequence>: Output del código</text:p></draw:text-box></draw:frame></text:p>
      <text:p text:style-name="P69"/>
      <text:p text:style-name="P69"/>
      <text:p text:style-name="P68"/>
      <text:p text:style-name="P68"/>
      <text:p text:style-name="P20"><text:span text:style-name="T27"/></text:p>
      <text:p text:style-name="P20"><text:span text:style-name="T27"/></text:p>
      <text:p text:style-name="P20"><text:span text:style-name="T27"/></text:p>
      <text:p text:style-name="P22"><text:span text:style-name="T27"/></text:p>
      <text:p text:style-name="P22"><text:span text:style-name="T27"/></text:p>
      <text:p text:style-name="P22"><text:span text:style-name="T27"/></text:p>
      <text:p text:style-name="P22"><text:span text:style-name="T27"/></text:p>
      <text:p text:style-name="P22"><text:span text:style-name="T27"/></text:p>
      <text:p text:style-name="P22"><text:span text:style-name="T27"/></text:p>
      <text:p text:style-name="P22"><text:span text:style-name="T27"/></text:p>
      <text:p text:style-name="P22"><text:span text:style-name="T27"/></text:p>
      <text:p text:style-name="P22"><text:span text:style-name="T27"/></text:p>
      <text:p text:style-name="P72"/>
      <text:p text:style-name="P76"/>
      <text:p text:style-name="P76">Este sería el Wireshark para verificar que me hace solo el ARP de la red local.</text:p>
      <text:p text:style-name="P76">Lo que dice ahí es lo siguiente:</text:p>
      <text:p text:style-name="P76">El equipo 172.19.0.1 está preguntando en broadcast quien tiene la IP 172.19.0.2 y que le responda, entonces dicha IP responde y le da su MAC, entonces la IP 172.19.0.1, ya conoce la MAC del otro.</text:p>
      <text:p text:style-name="P76">Luego se ejecuta la misma operación, pero el que acaba en “.3”:</text:p>
      <text:p text:style-name="P23"><draw:frame draw:style-name="fr1" draw:name="Marco12" text:anchor-type="char" svg:x="0cm" svg:y="0.138cm" svg:width="17cm" draw:z-index="38"><draw:text-box fo:min-height="2.24cm"><text:p text:style-name="Figure"><draw:frame draw:style-name="fr4" draw:name="Imagen20" text:anchor-type="paragraph" svg:width="17cm" style:rel-width="100%" svg:height="2.24cm" style:rel-height="scale" draw:z-index="39"><draw:image xlink:href="Pictures/10000001000004350000008EFB496693.png" xlink:type="simple" xlink:show="embed" xlink:actuate="onLoad" draw:mime-type="image/png"/></draw:frame>Figura <text:sequence text:ref-name="refFigure10" text:name="Figure" text:formula="ooow:Figure+1" style:num-format="1">11</text:sequence>: Prueba Wireshark ARP 1</text:p></draw:text-box></draw:frame><text:span text:style-name="T27"/></text:p>
      <text:p text:style-name="P23"><text:span text:style-name="T27"/></text:p>
      <text:p text:style-name="P44"/>
      <text:p text:style-name="P45"><text:bookmark-start text:name="__RefHeading___Toc1693_1505471852"/>Ahora haríamos la misma operación en Wireshark abro el de la interfaz con dicha IP para ver<text:span text:style-name="T63">i</text:span>ficarlo.<text:bookmark-end text:name="__RefHeading___Toc1693_1505471852"/></text:p>
      <text:p text:style-name="P47"><text:span text:style-name="T31"/></text:p>
      <text:p text:style-name="P136">Tenemos el host origen que es el 10.0.1.1 y comprueba si el host 10.0.1.10 está activo, para comprobar esto hace 3 técnicas distintas.</text:p>
      <text:p text:style-name="P35"><text:span text:style-name="T44"/></text:p>
      <text:p text:style-name="P136">Envía un primer paquete, este paquete es una solicitud ICMP tipo 13, le dice que si está activo que responda con la hora, no es un ping clásico es un “Timestamp Request”, como pedía el ejercicio.</text:p>
      <text:p text:style-name="P136">El segundo paquete el host de destino responde.</text:p>
      <text:p text:style-name="P136">El tercer paquete envía un datagrama UDP vacío al puerto 80 (el problema es que aquí Scapy usa puertos aleatorios y sale como si fuera el 53).</text:p>
      <text:p text:style-name="P136">El cuarto paquete responde que está vivo, pero que el puerto UDP está cerrado.</text:p>
      <text:p text:style-name="P34"><text:span text:style-name="T44">El quin</text:span><text:span text:style-name="T46">t</text:span><text:span text:style-name="T44">o paquete envía un paquete TCP con la flag de “ACK”, sin conexión previa, hace un “ACK scan”.</text:span></text:p>
      <text:p text:style-name="P137">El sexto paquete es el host respondiendo que no hay una conexión abierta y entonces resetea, haciendo ver que el TCP funciona.</text:p>
      <text:p text:style-name="P92"><draw:frame draw:style-name="fr1" draw:name="Marco13" text:anchor-type="char" svg:x="0cm" svg:y="0.399cm" svg:width="17cm" draw:z-index="40"><draw:text-box fo:min-height="2.478cm"><text:p text:style-name="Figure"><draw:frame draw:style-name="fr4" draw:name="Imagen21" text:anchor-type="paragraph" svg:width="17cm" style:rel-width="100%" svg:height="2.478cm" style:rel-height="scale" draw:z-index="41"><draw:image xlink:href="Pictures/1000000000000517000000BE08D419AF.png" xlink:type="simple" xlink:show="embed" xlink:actuate="onLoad" draw:mime-type="image/png"/></draw:frame>Figura <text:sequence text:ref-name="refFigure11" text:name="Figure" text:formula="ooow:Figure+1" style:num-format="1">12</text:sequence>: Prueba Wireshark ICMP, TCP y UDP 2</text:p></draw:text-box></draw:frame><text:span text:style-name="T30"/></text:p>
      <text:p text:style-name="P92"><text:span text:style-name="T30"/></text:p>
      <text:h text:style-name="P110" text:outline-level="2"><text:bookmark-start text:name="__RefHeading___Toc17076_1450507867"/>Parte 2: <text:span text:style-name="T50">Comportamiento por defecto nmap y port status</text:span><text:bookmark-end text:name="__RefHeading___Toc17076_1450507867"/></text:h>
      <text:p text:style-name="P10"><text:span text:style-name="T32"/></text:p>
      <text:p text:style-name="P53">Nmap (Network Mapper) es una herramienta muy popular, en la industria para la administración de redes y en la auditoría de seguridad. Simplemente ejecutando nmap con su configuración predefinida, se activa una serie de comportamientos preconfigurados que el auditor debe conocer a fondo.</text:p>
      <text:p text:style-name="P11"><text:span text:style-name="T27"/></text:p>
      <text:p text:style-name="P53">Para ello <text:span text:style-name="T56">voy</text:span> a realizar una serie de tareas que nos han definido:</text:p>
      <text:p text:style-name="P11"><text:span text:style-name="T27"/></text:p>
      <text:list xml:id="list1865160199" text:style-name="L4">
        <text:list-item>
          <text:p text:style-name="P126">Definir brevemente el concepto de estado de puerto y el tipo de estímulos y respuestas (campos de paquete) que permiten determinar su estado (abierto, cerrado, filtrado).</text:p>
        </text:list-item>
      </text:list>
      <text:p text:style-name="P57"/>
      <text:p text:style-name="P57">El concepto de estado de puerto nos indica si un servicio en una máquina remota está accesible o no desde la red. Nmap determina este estado enviando paquetes de red específicos (TCP y/o UDP) y analiza las respuestas del sistema objetivo.</text:p>
      <text:p text:style-name="P57"/>
      <text:p text:style-name="P57">Sus estados principales, los del puerto son los siguientes:</text:p>
      <text:p text:style-name="P57"/>
      <text:list text:style-name="L5">
        <text:list-item>
          <text:p text:style-name="P128">Abierto:</text:p>
          <text:list>
            <text:list-item>
              <text:p text:style-name="P128">El puerto está escuchando conexiones activamente y existe un servicio que responde a peticiones o respuestas que le lleguen. </text:p>
              <text:p text:style-name="P128"/>
            </text:list-item>
            <text:list-item>
              <text:p text:style-name="P128">Su respuesta típica en TCP sería <text:span text:style-name="T52">“SYN-ACK”.</text:span></text:p>
            </text:list-item>
          </text:list>
        </text:list-item>
      </text:list>
      <text:p text:style-name="P57"><text:span text:style-name="T52"/></text:p>
      <text:list text:continue-numbering="true" text:style-name="L5">
        <text:list-item>
          <text:p text:style-name="P138">Cerrado:</text:p>
          <text:list>
            <text:list-item>
              <text:p text:style-name="P138">El puerto es accesible, y es capaz de recibir respuestas, pero no hay ningún servicio escuchando, el cerrado si responde a los sondeos de nmap, lo que permite confirmar que dicho <text:span text:style-name="T53">host</text:span> está activo <text:span text:style-name="T53">y accesible</text:span>.</text:p>
            </text:list-item>
          </text:list>
        </text:list-item>
      </text:list>
      <text:p text:style-name="P81"/>
      <text:list text:continue-numbering="true" text:style-name="L5">
        <text:list-item>
          <text:list>
            <text:list-item>
              <text:p text:style-name="P138">Su respuesta típica en TCP sería <text:span text:style-name="T52">“RST”.</text:span></text:p>
            </text:list-item>
          </text:list>
        </text:list-item>
      </text:list>
      <text:p text:style-name="P81"><text:span text:style-name="T52"/></text:p>
      <text:list text:continue-numbering="true" text:style-name="L5">
        <text:list-item>
          <text:p text:style-name="P138">Filtrado:</text:p>
          <text:list>
            <text:list-item>
              <text:p text:style-name="P138">Un firewall o un filtro de red bloquea los paquetes, po<text:span text:style-name="T53">r</text:span> lo que nmap no puede determinar si está abierto o cerrado, este no recibe respuestas y no <text:span text:style-name="T53">puede determinarse si es accesible porque un firewall bloquea el tráfico</text:span>.</text:p>
            </text:list-item>
          </text:list>
        </text:list-item>
      </text:list>
      <text:p text:style-name="P81"/>
      <text:list text:continue-numbering="true" text:style-name="L5">
        <text:list-item>
          <text:list>
            <text:list-item>
              <text:p text:style-name="P145"><text:span text:style-name="T34">Su respuesta es que no hay respuesta o suele recibir “</text:span><text:span text:style-name="T35">ICMP unreachable”.</text:span></text:p>
            </text:list-item>
          </text:list>
        </text:list-item>
      </text:list>
      <text:p text:style-name="P81"><text:span text:style-name="T52"/></text:p>
      <text:p text:style-name="P81"/>
      <text:p text:style-name="P82"/>
      <text:p text:style-name="P81">El tipo de estímulos y respuestas que usa nmap sería las siguientes:</text:p>
      <text:p text:style-name="P81">Nmap envía principalmente lo siguiente:</text:p>
      <text:p text:style-name="P81"/>
      <text:list text:style-name="L6">
        <text:list-item>
          <text:p text:style-name="P139">SYN (TCP SYN scan) → est<text:span text:style-name="T64">á</text:span> intentando iniciar conexión.</text:p>
        </text:list-item>
        <text:list-item>
          <text:p text:style-name="P139">ACK / FIN / NULL / XMAS → son técnicas <text:span text:style-name="T53">de escaneo alternativas usadas para inferir en los estados de puertos y, en algunos casos, sortear ciertos filtros</text:span>.</text:p>
        </text:list-item>
        <text:list-item>
          <text:p text:style-name="P139">UDP packets → esto es para servicios UDP</text:p>
        </text:list-item>
      </text:list>
      <text:p text:style-name="P83"/>
      <text:p text:style-name="P83">Las respuestas son las vistas anteriormente para puerto abierto “SYN-ACK”, para puerto cerrado “RST” y para el puerto filtrado o no tiene respuesta o “ICMP blocked”</text:p>
      <text:p text:style-name="P12"><text:span text:style-name="T27"/></text:p>
      <text:list text:continue-list="list1865160199" text:style-name="L4">
        <text:list-item>
          <text:p text:style-name="P126">Identificar el comportamiento por defecto de nmap para el reconocimiento de puertos abiertos.</text:p>
        </text:list-item>
      </text:list>
      <text:p text:style-name="P53"/>
      <text:p text:style-name="P58">Para identificar el comportamiento por defecto de nmap voy a realizar el comando de “nmap localhost”:</text:p>
      <text:p text:style-name="P58"/>
      <text:list text:continue-numbering="true" text:style-name="L4">
        <text:list-item>
          <text:list>
            <text:list-item>
              <text:p text:style-name="P127">Conteo de puertos:</text:p>
            </text:list-item>
          </text:list>
        </text:list-item>
      </text:list>
      <text:p text:style-name="P55"/>
      <text:p text:style-name="P59">Para identificar el comportamiento por defecto de nmap voy a realizar el comando de “nmap localhost” <text:span text:style-name="T54">y me sirve también para el conteo de puertos</text:span>:</text:p>
      <text:p text:style-name="P59"/>
      <text:p text:style-name="P60"><draw:frame draw:style-name="fr2" draw:name="Marco14" text:anchor-type="char" svg:width="14.626cm" draw:z-index="2"><draw:text-box fo:min-height="3.679cm"><text:p text:style-name="Figure"><draw:frame draw:style-name="fr4" draw:name="Imagen1" text:anchor-type="paragraph" svg:width="14.626cm" style:rel-width="100%" svg:height="3.679cm" style:rel-height="scale" draw:z-index="3"><draw:image xlink:href="Pictures/10000001000002E7000000BB468F7CE9.png" xlink:type="simple" xlink:show="embed" xlink:actuate="onLoad" draw:mime-type="image/png"/></draw:frame>Figura <text:sequence text:ref-name="refFigure12" text:name="Figure" text:formula="ooow:Figure+1" style:num-format="1">13</text:sequence>: nmap localhost resultado</text:p></draw:text-box></draw:frame></text:p>
      <text:p text:style-name="P60">Este escaneo me dice varias cosas, el host est<text:span text:style-name="T65">á</text:span> activo o “up”, la máquina responde, luego escaneó 1000 puertos TCP más comunes, pero ningún servicio está escuchando en esos puertos en el momento del escaneo y el método de detección el “reset”, nos indica que los puertos cerrados respondieron con paquetes TCP RST.</text:p>
      <text:p text:style-name="P55"><text:span text:style-name="T27"/></text:p>
      <text:p text:style-name="P56"/>
      <text:p text:style-name="P54"/>
      <text:list xml:id="list103328452430768" text:continue-numbering="true" text:style-name="L4">
        <text:list-item>
          <text:list>
            <text:list-item>
              <text:p text:style-name="P126">Conteo de paquetes enviados.</text:p>
            </text:list-item>
          </text:list>
        </text:list-item>
      </text:list>
      <text:p text:style-name="P53"><draw:frame draw:style-name="fr1" draw:name="Marco15" text:anchor-type="char" svg:x="2.76cm" svg:y="0.46cm" svg:width="10.998cm" draw:z-index="4"><draw:text-box fo:min-height="4.512cm"><text:p text:style-name="Figure"><draw:frame draw:style-name="fr4" draw:name="Imagen2" text:anchor-type="paragraph" svg:width="10.998cm" style:rel-width="100%" svg:height="4.512cm" style:rel-height="scale" draw:z-index="5"><draw:image xlink:href="Pictures/10000001000004D3000002001916CE66.png" xlink:type="simple" xlink:show="embed" xlink:actuate="onLoad" draw:mime-type="image/png"/></draw:frame>Figura <text:sequence text:ref-name="refFigure13" text:name="Figure" text:formula="ooow:Figure+1" style:num-format="1">14</text:sequence>: Conteo de paquetes enviados</text:p></draw:text-box></draw:frame></text:p>
      <text:p text:style-name="P53"/>
      <text:p text:style-name="P53"/>
      <text:p text:style-name="P53"/>
      <text:p text:style-name="P53"/>
      <text:p text:style-name="P60"/>
      <text:p text:style-name="P60"/>
      <text:p text:style-name="P60"/>
      <text:p text:style-name="P60"/>
      <text:p text:style-name="P60"/>
      <text:p text:style-name="P60"/>
      <text:p text:style-name="P60">El parámetro que uso muestra cada paquete enviado y recibido por nmap durante el escaneo.</text:p>
      <text:p text:style-name="P60"/>
      <text:p text:style-name="P60">Ejemplo de paquete enviado:</text:p>
      <text:p text:style-name="P60"/>
      <text:p text:style-name="P60">“SENT TCP 127.0.0.1:53647 &gt; 127.0.0.1:554 S”</text:p>
      <text:p text:style-name="P60"/>
      <text:list text:style-name="L7">
        <text:list-item>
          <text:p text:style-name="P129">Esto significa que nmap usa un puerto origen aleatorio (53647)</text:p>
        </text:list-item>
        <text:list-item>
          <text:p text:style-name="P129">Envía un paquete TCP SYN.</text:p>
        </text:list-item>
        <text:list-item>
          <text:p text:style-name="P129">El destino del puerto es 554.</text:p>
        </text:list-item>
        <text:list-item>
          <text:p text:style-name="P129">La conclusión es que intenta comprobar si ese puerto está abierto.</text:p>
        </text:list-item>
      </text:list>
      <text:p text:style-name="P84"><text:span text:style-name="T36"/></text:p>
      <text:p text:style-name="P60">Ejemplo de respuesta recibida:</text:p>
      <text:p text:style-name="P84"><text:span text:style-name="T36"/></text:p>
      <text:p text:style-name="P84"><text:span text:style-name="T36">“RCVD </text:span><text:span text:style-name="T38">TCP 127.0.0.1:554 &gt; 127.0.0.1:53647 RA”</text:span></text:p>
      <text:p text:style-name="P84"><text:span text:style-name="T38"/></text:p>
      <text:list text:style-name="L8">
        <text:list-item>
          <text:p text:style-name="P130">Esto significa que el puerto responde con “RST + ACK”, indicando que el puerto está cerrado.</text:p>
        </text:list-item>
      </text:list>
      <text:p text:style-name="P85"><text:span text:style-name="T36"/></text:p>
      <text:p text:style-name="P64">Nmap hace lo siguiente:</text:p>
      <text:p text:style-name="P85"><text:span text:style-name="T36"/></text:p>
      <text:p text:style-name="P64">Envía SYN y espera respuesta. Si recibe “SYN-ACK”, está abierto, si recibe “RST-ACK”, está cerrado y si no recibe nada está filtrado.</text:p>
      <text:p text:style-name="P61"/>
      <text:p text:style-name="P61">En este caso responde con RA, por eso salen que están cerrados.</text:p>
      <text:p text:style-name="P61"/>
      <text:p text:style-name="P61">Sale el escaneo de 1000 puertos y me salía 1000 salidas por lo que interpreto que se env<text:span text:style-name="T66">í</text:span>a paquete por puerto escaneado, en resumen son 1000 paquetes SYN enviados por puerto. </text:p>
      <text:p text:style-name="P54"/>
      <text:list text:continue-list="list103328452430768" text:style-name="L4">
        <text:list-item>
          <text:list>
            <text:list-item>
              <text:p text:style-name="P144"><text:span text:style-name="T27">Dar ejemplos con al menos dos servicios expuestos (y el caso de puerto cerrado), para esta parte la realizaré con un “docker compose” </text:span><text:span text:style-name="T33">con tres servicios activos.</text:span></text:p>
              <text:p text:style-name="P126"><text:span text:style-name="T68">3</text:span>.(Inc, 2026) </text:p>
            </text:list-item>
          </text:list>
        </text:list-item>
      </text:list>
      <text:p text:style-name="P53"/>
      <text:p text:style-name="P62">Dicho docker compose es el siguiente:</text:p>
      <text:p text:style-name="P62"/>
      <text:p text:style-name="P62"><draw:frame draw:style-name="fr1" draw:name="Marco16" text:anchor-type="char" svg:x="5.883cm" svg:y="-0.028cm" svg:width="5.629cm" draw:z-index="6"><draw:text-box fo:min-height="11.333cm"><text:p text:style-name="Figure"><draw:frame draw:style-name="fr4" draw:name="Imagen4" text:anchor-type="paragraph" svg:width="5.629cm" style:rel-width="100%" svg:height="11.333cm" style:rel-height="scale" draw:z-index="7"><draw:image xlink:href="Pictures/1000000000000177000002F3C417DFF8.png" xlink:type="simple" xlink:show="embed" xlink:actuate="onLoad" draw:mime-type="image/png"/></draw:frame>Figura <text:sequence text:ref-name="refFigure14" text:name="Figure" text:formula="ooow:Figure+1" style:num-format="1">15</text:sequence>: Docker compose 4</text:p></draw:text-box></draw:frame></text:p>
      <text:p text:style-name="P53"/>
      <text:p text:style-name="P13"><text:span text:style-name="T27"/></text:p>
      <text:p text:style-name="P86"><text:span text:style-name="T37"/></text:p>
      <text:p text:style-name="P86"><text:span text:style-name="T37"/></text:p>
      <text:p text:style-name="P86"><text:span text:style-name="T37"/></text:p>
      <text:p text:style-name="P86"><text:span text:style-name="T37"/></text:p>
      <text:p text:style-name="P86"><text:span text:style-name="T37"/></text:p>
      <text:p text:style-name="P86"><text:span text:style-name="T37"/></text:p>
      <text:p text:style-name="P86"><text:span text:style-name="T37"/></text:p>
      <text:p text:style-name="P86"><text:span text:style-name="T37"/></text:p>
      <text:p text:style-name="P86"><text:span text:style-name="T37"/></text:p>
      <text:p text:style-name="P86"><text:span text:style-name="T37"/></text:p>
      <text:p text:style-name="P86"><text:span text:style-name="T37"/></text:p>
      <text:p text:style-name="P86"><text:span text:style-name="T37"/></text:p>
      <text:p text:style-name="P86"><text:span text:style-name="T37"/></text:p>
      <text:p text:style-name="P86"><text:span text:style-name="T37"/></text:p>
      <text:p text:style-name="P86"><text:span text:style-name="T37"/></text:p>
      <text:p text:style-name="P86"><text:span text:style-name="T37"/></text:p>
      <text:p text:style-name="P86"><text:span text:style-name="T37"/></text:p>
      <text:p text:style-name="P86"><text:span text:style-name="T37"/></text:p>
      <text:p text:style-name="P86"><text:span text:style-name="T37"/></text:p>
      <text:p text:style-name="P87"><text:span text:style-name="T37"/></text:p>
      <text:p text:style-name="P87"><text:span text:style-name="T36"><text:s/></text:span><text:span text:style-name="T41">T</text:span><text:span text:style-name="T36">engo 3 servicios, uno de SSH, otro de FTP y el último de HTTP</text:span></text:p>
      <text:p text:style-name="P87"><text:span text:style-name="T36"/></text:p>
      <text:p text:style-name="P63">Para ello levanto este docker compose primero y verifico que se haya levantado de forma correcta:</text:p>
      <text:p text:style-name="P87"><draw:frame draw:style-name="fr1" draw:name="Marco17" text:anchor-type="char" svg:x="0cm" svg:y="0.452cm" svg:width="17cm" draw:z-index="8"><draw:text-box fo:min-height="2.808cm"><text:p text:style-name="Figure"><draw:frame draw:style-name="fr4" draw:name="Imagen5" text:anchor-type="paragraph" svg:width="17cm" style:rel-width="100%" svg:height="2.808cm" style:rel-height="scale" draw:z-index="9"><draw:image xlink:href="Pictures/1000000100000607000000FF7561B7B1.png" xlink:type="simple" xlink:show="embed" xlink:actuate="onLoad" draw:mime-type="image/png"/></draw:frame>Figura <text:sequence text:ref-name="refFigure15" text:name="Figure" text:formula="ooow:Figure+1" style:num-format="1">16</text:sequence>: Levantar docker compose</text:p></draw:text-box></draw:frame><text:span text:style-name="T36"/></text:p>
      <text:p text:style-name="P87"/>
      <text:p text:style-name="P87"/>
      <text:p text:style-name="P88"/>
      <text:p text:style-name="P87">Tras comprobar que funciona de forma correcta iré a hacer el análisis de dichos puertos en concreto más el puerto cerrado:</text:p>
      <text:p text:style-name="P87"/>
      <text:p text:style-name="P87"><draw:frame draw:style-name="fr1" draw:name="Marco18" text:anchor-type="char" svg:x="1.453cm" svg:y="0.226cm" svg:width="14.425cm" draw:z-index="10"><draw:text-box fo:min-height="6.459cm"><text:p text:style-name="Figure"><draw:frame draw:style-name="fr5" draw:name="Imagen6" text:anchor-type="paragraph" svg:width="14.425cm" style:rel-width="100%" svg:height="6.459cm" style:rel-height="scale" draw:z-index="11"><draw:image xlink:href="Pictures/10000001000002BC0000010ADB179DF1.png" xlink:type="simple" xlink:show="embed" xlink:actuate="onLoad" draw:mime-type="image/png"/></draw:frame>Figura <text:sequence text:ref-name="refFigure16" text:name="Figure" text:formula="ooow:Figure+1" style:num-format="1">17</text:sequence>: Resultado de análisis</text:p></draw:text-box></draw:frame></text:p>
      <text:p text:style-name="P87">Como se aprecia los 3 servicios que he levantado se verían como “open”, y están listos para escuchar y el otro el 23 no está levantado, luego como dato curioso el puerto 2222, en realidad se asigna a otro, pero en docker compose lo he mapeado en dicho puerto, eso nmap no sabe diferenciarlo, <text:span text:style-name="T55">el solo lo asigna con la base datos que tiene.</text:span></text:p>
      <text:list text:continue-numbering="true" text:style-name="L4">
        <text:list-header>
          <text:p text:style-name="P146"/>
        </text:list-header>
        <text:list-item>
          <text:p text:style-name="P147"><text:span text:style-name="T37">Justificar los hallazgos mediante algún packet sniffer (scapy, wireshark, tcpdump…), como dato nos dicen que solo nos fijaremos en el recono</text:span><text:span text:style-name="T39">ci</text:span><text:span text:style-name="T37">miento de puertos, descartando el tráfico de nmap para el descubrimiento y resolución de nombre de hosts activos.</text:span></text:p>
        </text:list-item>
      </text:list>
      <text:p text:style-name="P41"><text:span text:style-name="T37"/></text:p>
      <text:p text:style-name="P89"><text:span text:style-name="T37">A</text:span><text:span text:style-name="T36">bro el Wireshark y selecciono la interfaz correspondiente al docker compose:</text:span></text:p>
      <text:p text:style-name="P89"><draw:frame draw:style-name="fr1" draw:name="Marco19" text:anchor-type="char" svg:x="1.191cm" svg:y="0.206cm" svg:width="14.619cm" draw:z-index="12"><draw:text-box fo:min-height="5.741cm"><text:p text:style-name="Figure"><draw:frame draw:style-name="fr4" draw:name="Imagen7" text:anchor-type="paragraph" svg:width="14.619cm" style:rel-width="100%" svg:height="5.741cm" style:rel-height="scale" draw:z-index="13"><draw:image xlink:href="Pictures/1000000100000763000002E7DDE50CF2.png" xlink:type="simple" xlink:show="embed" xlink:actuate="onLoad" draw:mime-type="image/png"/></draw:frame>Figura <text:sequence text:ref-name="refFigure17" text:name="Figure" text:formula="ooow:Figure+1" style:num-format="1">18</text:sequence>: Interfaz Wireshark</text:p></draw:text-box></draw:frame><text:span text:style-name="T36"/></text:p>
      <text:p text:style-name="P78"/>
      <text:p text:style-name="P79"/>
      <text:p text:style-name="P78">Realizamos el comando correspondiente con nmap filtrando el descubrimiento de host, para ello usaré el parámetro “-Pn” que me ayuda a evitar el descubrimiento de host:</text:p>
      <text:p text:style-name="P89"><draw:frame draw:style-name="fr1" draw:name="Marco20" text:anchor-type="char" svg:x="3.427cm" svg:y="0.395cm" svg:width="10.146cm" draw:z-index="14"><draw:text-box fo:min-height="4.362cm"><text:p text:style-name="Figure"><draw:frame draw:style-name="fr4" draw:name="Imagen8" text:anchor-type="paragraph" svg:width="10.146cm" style:rel-width="100%" svg:height="4.362cm" style:rel-height="scale" draw:z-index="15"><draw:image xlink:href="Pictures/10000000000003100000015123A9983B.png" xlink:type="simple" xlink:show="embed" xlink:actuate="onLoad" draw:mime-type="image/png"/></draw:frame>Figura <text:sequence text:ref-name="refFigure18" text:name="Figure" text:formula="ooow:Figure+1" style:num-format="1">19</text:sequence>: Análisis de puertos concre<text:span text:style-name="T62">t</text:span>o</text:p></draw:text-box></draw:frame><text:span text:style-name="T36"/></text:p>
      <text:p text:style-name="P90"/>
      <text:p text:style-name="P90"/>
      <text:p text:style-name="P90"/>
      <text:p text:style-name="P90"/>
      <text:p text:style-name="P90"/>
      <text:p text:style-name="P90"/>
      <text:p text:style-name="P90"/>
      <text:p text:style-name="P90"/>
      <text:p text:style-name="P90"/>
      <text:p text:style-name="P90"/>
      <text:p text:style-name="P90"><draw:frame draw:style-name="fr1" draw:name="Marco21" text:anchor-type="char" svg:x="0cm" svg:y="0.141cm" svg:width="17cm" draw:z-index="16"><draw:text-box fo:min-height="2.861cm"><text:p text:style-name="Figure"><draw:frame draw:style-name="fr4" draw:name="Imagen9" text:anchor-type="paragraph" svg:width="17cm" style:rel-width="100%" svg:height="2.861cm" style:rel-height="scale" draw:z-index="17"><draw:image xlink:href="Pictures/1000000100000503000000D857D49AA7.png" xlink:type="simple" xlink:show="embed" xlink:actuate="onLoad" draw:mime-type="image/png"/></draw:frame>Figura <text:sequence text:ref-name="refFigure19" text:name="Figure" text:formula="ooow:Figure+1" style:num-format="1">20</text:sequence>: Resultado de Wireshark</text:p></draw:text-box></draw:frame></text:p>
      <text:p text:style-name="P91">He utilizado <text:span text:style-name="T67">W</text:span>ireshark como herramienta de análisis de tráfico durante la ejecución de nmap sobre el host local.</text:p>
      <text:p text:style-name="P91"/>
      <text:p text:style-name="P91">Durante el escaneo de puertos se observa paquetes TCP de tipo “SYN” enviados por nmap hacia los puertos que he seleccionado en concreto. En los puertos 21, 2222 y 8080, se recibieron respuestas “SYN-ACK”, lo que indica que dichos p<text:span text:style-name="T67">u</text:span>ertos se encuentran abiertos y existen servicios escuchando.</text:p>
      <text:p text:style-name="P91"/>
      <text:p text:style-name="P91">Posteriormente, nmap finaliza la conexión mediante el envío de paquetes RST. En el caso del puerto 23 se ve que la respuesta “RST-ACK” al instante del SYN, indicando que está cerrado el puerto.</text:p>
      <text:h text:style-name="P3" text:outline-level="1"><text:bookmark-start text:name="__RefHeading___Toc1996_2704774588 Copia 1 Copia 2 Copia 1"/><text:span text:style-name="T20">4</text:span><text:span text:style-name="T14">. </text:span><text:span text:style-name="T20">Resultados</text:span><text:span text:style-name="T18">:</text:span><text:bookmark-end text:name="__RefHeading___Toc1996_2704774588 Copia 1 Copia 2 Copia 1"/></text:h>
      <text:h text:style-name="P111" text:outline-level="2"><text:bookmark-start text:name="__RefHeading___Toc1695_1505471852"/>Parte 1 descubrimiento de hosts con scapy:<text:bookmark-end text:name="__RefHeading___Toc1695_1505471852"/></text:h>
      <text:p text:style-name="P102"><text:span text:style-name="T36"/></text:p>
      <text:list text:style-name="L9">
        <text:list-item>
          <text:p text:style-name="P131">Resultado con ARP:</text:p>
        </text:list-item>
      </text:list>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header-rows>
          <table:table-row>
            <table:table-cell table:style-name="Tabla7.A1" office:value-type="string">
              <text:p text:style-name="Table_20_Heading">Tipo de prueba</text:p>
            </table:table-cell>
            <table:table-cell table:style-name="Tabla7.A1" office:value-type="string">
              <text:p text:style-name="Table_20_Heading">IP objetivo</text:p>
            </table:table-cell>
            <table:table-cell table:style-name="Tabla7.A1" office:value-type="string">
              <text:p text:style-name="Table_20_Heading">Protocolo usado</text:p>
            </table:table-cell>
            <table:table-cell table:style-name="Tabla7.A1" office:value-type="string">
              <text:p text:style-name="Table_20_Heading">Respuesta recibida</text:p>
            </table:table-cell>
            <table:table-cell table:style-name="Tabla7.A1" office:value-type="string">
              <text:p text:style-name="Table_20_Heading">Resultado</text:p>
            </table:table-cell>
            <table:table-cell table:style-name="Tabla7.A1" office:value-type="string">
              <text:p text:style-name="Table_20_Heading">Interpretación</text:p>
            </table:table-cell>
          </table:table-row>
        </table:table-header-rows>
        <table:table-row>
          <table:table-cell table:style-name="Tabla7.A1" office:value-type="string">
            <text:p text:style-name="Table_20_Contents">Red local Docker</text:p>
          </table:table-cell>
          <table:table-cell table:style-name="Tabla7.A1" office:value-type="string">
            <text:p text:style-name="Table_20_Contents">172.19.0.2</text:p>
          </table:table-cell>
          <table:table-cell table:style-name="Tabla7.A1" office:value-type="string">
            <text:p text:style-name="Table_20_Contents">ARP</text:p>
          </table:table-cell>
          <table:table-cell table:style-name="Tabla7.A1" office:value-type="string">
            <text:p text:style-name="Table_20_Contents"><text:span text:style-name="Source_20_Text">172.19.0.2 is at ...</text:span></text:p>
          </table:table-cell>
          <table:table-cell table:style-name="Tabla7.A1" office:value-type="string">
            <text:p text:style-name="Table_20_Contents">Activo</text:p>
          </table:table-cell>
          <table:table-cell table:style-name="Tabla7.A1" office:value-type="string">
            <text:p text:style-name="Table_20_Contents">Host responde ARP y existe en la LAN</text:p>
          </table:table-cell>
        </table:table-row>
        <table:table-row>
          <table:table-cell table:style-name="Tabla7.A1" office:value-type="string">
            <text:p text:style-name="Table_20_Contents">Red local Docker</text:p>
          </table:table-cell>
          <table:table-cell table:style-name="Tabla7.A1" office:value-type="string">
            <text:p text:style-name="Table_20_Contents">172.19.0.3</text:p>
          </table:table-cell>
          <table:table-cell table:style-name="Tabla7.A1" office:value-type="string">
            <text:p text:style-name="Table_20_Contents">ARP</text:p>
          </table:table-cell>
          <table:table-cell table:style-name="Tabla7.A1" office:value-type="string">
            <text:p text:style-name="Table_20_Contents"><text:span text:style-name="Source_20_Text">172.19.0.3 is at ...</text:span></text:p>
          </table:table-cell>
          <table:table-cell table:style-name="Tabla7.A1" office:value-type="string">
            <text:p text:style-name="Table_20_Contents">Activo</text:p>
          </table:table-cell>
          <table:table-cell table:style-name="Tabla7.A1" office:value-type="string">
            <text:p text:style-name="Table_20_Contents">Host responde ARP y existe en la LAN</text:p>
          </table:table-cell>
        </table:table-row>
        <table:table-row>
          <table:table-cell table:style-name="Tabla7.A1" office:value-type="string">
            <text:p text:style-name="Table_20_Contents">Red local Docker</text:p>
          </table:table-cell>
          <table:table-cell table:style-name="Tabla7.A1" office:value-type="string">
            <text:p text:style-name="Table_20_Contents">172.19.0.4</text:p>
          </table:table-cell>
          <table:table-cell table:style-name="Tabla7.A1" office:value-type="string">
            <text:p text:style-name="Table_20_Contents">ARP</text:p>
          </table:table-cell>
          <table:table-cell table:style-name="Tabla7.A1" office:value-type="string">
            <text:p text:style-name="Table_20_Contents"><text:span text:style-name="Source_20_Text">172.19.0.4 is at ...</text:span></text:p>
          </table:table-cell>
          <table:table-cell table:style-name="Tabla7.A1" office:value-type="string">
            <text:p text:style-name="Table_20_Contents">Activo</text:p>
          </table:table-cell>
          <table:table-cell table:style-name="Tabla7.A1" office:value-type="string">
            <text:p text:style-name="Table_20_Contents">Host responde ARP y existe en la LAN</text:p>
          </table:table-cell>
        </table:table-row>
        <table:table-row>
          <table:table-cell table:style-name="Tabla7.A1" office:value-type="string">
            <text:p text:style-name="Table_20_Contents">Red local Docker</text:p>
          </table:table-cell>
          <table:table-cell table:style-name="Tabla7.A1" office:value-type="string">
            <text:p text:style-name="Table_20_Contents">172.19.0.5</text:p>
          </table:table-cell>
          <table:table-cell table:style-name="Tabla7.A1" office:value-type="string">
            <text:p text:style-name="Table_20_Contents">ARP</text:p>
          </table:table-cell>
          <table:table-cell table:style-name="Tabla7.A1" office:value-type="string">
            <text:p text:style-name="Table_20_Contents">Sin respuesta</text:p>
          </table:table-cell>
          <table:table-cell table:style-name="Tabla7.A1" office:value-type="string">
            <text:p text:style-name="Table_20_Contents">Inactivo / no existe</text:p>
          </table:table-cell>
          <table:table-cell table:style-name="Tabla7.A1" office:value-type="string">
            <text:p text:style-name="Table_20_Contents">No se detecta host</text:p>
          </table:table-cell>
        </table:table-row>
        <table:table-row>
          <table:table-cell table:style-name="Tabla7.A1" office:value-type="string">
            <text:p text:style-name="Table_20_Contents">Red local Docker</text:p>
          </table:table-cell>
          <table:table-cell table:style-name="Tabla7.A1" office:value-type="string">
            <text:p text:style-name="Table_20_Contents">172.19.0.6</text:p>
          </table:table-cell>
          <table:table-cell table:style-name="Tabla7.A1" office:value-type="string">
            <text:p text:style-name="Table_20_Contents">ARP</text:p>
          </table:table-cell>
          <table:table-cell table:style-name="Tabla7.A1" office:value-type="string">
            <text:p text:style-name="Table_20_Contents">Sin respuesta</text:p>
          </table:table-cell>
          <table:table-cell table:style-name="Tabla7.A1" office:value-type="string">
            <text:p text:style-name="Table_20_Contents">Inactivo / no existe</text:p>
          </table:table-cell>
          <table:table-cell table:style-name="Tabla7.A1" office:value-type="string">
            <text:p text:style-name="Table_20_Contents">No se detecta host</text:p>
          </table:table-cell>
        </table:table-row>
        <table:table-row>
          <table:table-cell table:style-name="Tabla7.A1" office:value-type="string">
            <text:p text:style-name="Table_20_Contents">Red local Docker</text:p>
          </table:table-cell>
          <table:table-cell table:style-name="Tabla7.A1" office:value-type="string">
            <text:p text:style-name="Table_20_Contents">172.19.0.7</text:p>
          </table:table-cell>
          <table:table-cell table:style-name="Tabla7.A1" office:value-type="string">
            <text:p text:style-name="Table_20_Contents">ARP</text:p>
          </table:table-cell>
          <table:table-cell table:style-name="Tabla7.A1" office:value-type="string">
            <text:p text:style-name="Table_20_Contents">Sin respuesta</text:p>
          </table:table-cell>
          <table:table-cell table:style-name="Tabla7.A1" office:value-type="string">
            <text:p text:style-name="Table_20_Contents">Inactivo / no existe</text:p>
          </table:table-cell>
          <table:table-cell table:style-name="Tabla7.A1" office:value-type="string">
            <text:p text:style-name="Table_20_Contents">No se detecta host</text:p>
          </table:table-cell>
        </table:table-row>
      </table:table>
      <text:p text:style-name="P103"><text:span text:style-name="T36"/></text:p>
      <text:list text:continue-numbering="true" text:style-name="L9">
        <text:list-item>
          <text:p text:style-name="P132">Resultado con ICMP, UDP y TCP:</text:p>
        </text:list-item>
      </text:list>
      <text:p text:style-name="P104"><text:span text:style-name="T36"/></text:p>
      <table:table table:name="Tabla8" table:style-name="Tabla8">
        <table:table-column table:style-name="Tabla8.A"/>
        <table:table-column table:style-name="Tabla8.B"/>
        <table:table-column table:style-name="Tabla8.C"/>
        <table:table-column table:style-name="Tabla8.D"/>
        <table:table-column table:style-name="Tabla8.E"/>
        <table:table-header-rows>
          <table:table-row>
            <table:table-cell table:style-name="Tabla8.A1" office:value-type="string">
              <text:p text:style-name="Table_20_Heading">IP objetivo</text:p>
            </table:table-cell>
            <table:table-cell table:style-name="Tabla8.A1" office:value-type="string">
              <text:p text:style-name="Table_20_Heading">Protocolo</text:p>
            </table:table-cell>
            <table:table-cell table:style-name="Tabla8.A1" office:value-type="string">
              <text:p text:style-name="Table_20_Heading">Respuesta</text:p>
            </table:table-cell>
            <table:table-cell table:style-name="Tabla8.A1" office:value-type="string">
              <text:p text:style-name="Table_20_Heading">Resultado</text:p>
            </table:table-cell>
            <table:table-cell table:style-name="Tabla8.A1" office:value-type="string">
              <text:p text:style-name="Table_20_Heading">Interpretación</text:p>
            </table:table-cell>
          </table:table-row>
        </table:table-header-rows>
        <table:table-row>
          <table:table-cell table:style-name="Tabla8.A1" office:value-type="string">
            <text:p text:style-name="Table_20_Contents">10.0.1.10</text:p>
          </table:table-cell>
          <table:table-cell table:style-name="Tabla8.A1" office:value-type="string">
            <text:p text:style-name="Table_20_Contents">ICMP Timestamp</text:p>
          </table:table-cell>
          <table:table-cell table:style-name="Tabla8.A1" office:value-type="string">
            <text:p text:style-name="Table_20_Contents">Timestamp Reply</text:p>
          </table:table-cell>
          <table:table-cell table:style-name="Tabla8.A1" office:value-type="string">
            <text:p text:style-name="Table_20_Contents">Activo</text:p>
          </table:table-cell>
          <table:table-cell table:style-name="Tabla8.A1" office:value-type="string">
            <text:p text:style-name="Table_20_Contents">Host responde a ICMP</text:p>
          </table:table-cell>
        </table:table-row>
        <table:table-row>
          <table:table-cell table:style-name="Tabla8.A1" office:value-type="string">
            <text:p text:style-name="Table_20_Contents">10.0.1.10</text:p>
          </table:table-cell>
          <table:table-cell table:style-name="Tabla8.A1" office:value-type="string">
            <text:p text:style-name="Table_20_Contents">UDP puerto 80</text:p>
          </table:table-cell>
          <table:table-cell table:style-name="Tabla8.A1" office:value-type="string">
            <text:p text:style-name="Table_20_Contents">ICMP Port Unreachable</text:p>
          </table:table-cell>
          <table:table-cell table:style-name="Tabla8.A1" office:value-type="string">
            <text:p text:style-name="Table_20_Contents">Activo</text:p>
          </table:table-cell>
          <table:table-cell table:style-name="Tabla8.A1" office:value-type="string">
            <text:p text:style-name="Table_20_Contents">Host existe aunque puerto cerrado</text:p>
          </table:table-cell>
        </table:table-row>
        <table:table-row>
          <table:table-cell table:style-name="Tabla8.A1" office:value-type="string">
            <text:p text:style-name="Table_20_Contents">10.0.1.10</text:p>
          </table:table-cell>
          <table:table-cell table:style-name="Tabla8.A1" office:value-type="string">
            <text:p text:style-name="Table_20_Contents">TCP ACK puerto 80</text:p>
          </table:table-cell>
          <table:table-cell table:style-name="Tabla8.A1" office:value-type="string">
            <text:p text:style-name="Table_20_Contents">TCP RST</text:p>
          </table:table-cell>
          <table:table-cell table:style-name="Tabla8.A1" office:value-type="string">
            <text:p text:style-name="Table_20_Contents">Activo</text:p>
          </table:table-cell>
          <table:table-cell table:style-name="Tabla8.A1" office:value-type="string">
            <text:p text:style-name="Table_20_Contents">Host activo con pila TCP</text:p>
          </table:table-cell>
        </table:table-row>
        <table:table-row>
          <table:table-cell table:style-name="Tabla8.A1" office:value-type="string">
            <text:p text:style-name="Table_20_Contents">10.0.2.10</text:p>
          </table:table-cell>
          <table:table-cell table:style-name="Tabla8.A1" office:value-type="string">
            <text:p text:style-name="Table_20_Contents">ICMP/TCP/UDP</text:p>
          </table:table-cell>
          <table:table-cell table:style-name="Tabla8.A1" office:value-type="string">
            <text:p text:style-name="Table_20_Contents">Respuesta detectada</text:p>
          </table:table-cell>
          <table:table-cell table:style-name="Tabla8.A1" office:value-type="string">
            <text:p text:style-name="Table_20_Contents">Activo</text:p>
          </table:table-cell>
          <table:table-cell table:style-name="Tabla8.A1" office:value-type="string">
            <text:p text:style-name="Table_20_Contents">Host remoto accesible</text:p>
          </table:table-cell>
        </table:table-row>
      </table:table>
      <text:p text:style-name="P104"><text:span text:style-name="T36"/></text:p>
      <text:list text:continue-numbering="true" text:style-name="L9">
        <text:list-item>
          <text:p text:style-name="P132">Host activos:</text:p>
        </text:list-item>
      </text:list>
      <table:table table:name="Tabla9" table:style-name="Tabla9">
        <table:table-column table:style-name="Tabla9.A"/>
        <table:table-column table:style-name="Tabla9.B"/>
        <table:table-header-rows>
          <table:table-row>
            <table:table-cell table:style-name="Tabla9.A1" office:value-type="string">
              <text:p text:style-name="Table_20_Heading">Host detectado</text:p>
            </table:table-cell>
            <table:table-cell table:style-name="Tabla9.A1" office:value-type="string">
              <text:p text:style-name="Table_20_Heading">Tipo de detección</text:p>
            </table:table-cell>
          </table:table-row>
        </table:table-header-rows>
        <table:table-row>
          <table:table-cell table:style-name="Tabla9.A1" office:value-type="string">
            <text:p text:style-name="Table_20_Contents">172.19.0.2</text:p>
          </table:table-cell>
          <table:table-cell table:style-name="Tabla9.A1" office:value-type="string">
            <text:p text:style-name="Table_20_Contents">ARP</text:p>
          </table:table-cell>
        </table:table-row>
        <table:table-row>
          <table:table-cell table:style-name="Tabla9.A1" office:value-type="string">
            <text:p text:style-name="Table_20_Contents">172.19.0.3</text:p>
          </table:table-cell>
          <table:table-cell table:style-name="Tabla9.A1" office:value-type="string">
            <text:p text:style-name="Table_20_Contents">ARP</text:p>
          </table:table-cell>
        </table:table-row>
        <table:table-row>
          <table:table-cell table:style-name="Tabla9.A1" office:value-type="string">
            <text:p text:style-name="Table_20_Contents">172.19.0.4</text:p>
          </table:table-cell>
          <table:table-cell table:style-name="Tabla9.A1" office:value-type="string">
            <text:p text:style-name="Table_20_Contents">ARP</text:p>
          </table:table-cell>
        </table:table-row>
        <table:table-row>
          <table:table-cell table:style-name="Tabla9.A1" office:value-type="string">
            <text:p text:style-name="Table_20_Contents">10.0.1.10</text:p>
          </table:table-cell>
          <table:table-cell table:style-name="Tabla9.A1" office:value-type="string">
            <text:p text:style-name="Table_20_Contents">ICMP / UDP / TCP</text:p>
          </table:table-cell>
        </table:table-row>
        <table:table-row>
          <table:table-cell table:style-name="Tabla9.A1" office:value-type="string">
            <text:p text:style-name="Table_20_Contents">10.0.2.10</text:p>
          </table:table-cell>
          <table:table-cell table:style-name="Tabla9.A1" office:value-type="string">
            <text:p text:style-name="Table_20_Contents">ICMP / UDP / TCP</text:p>
          </table:table-cell>
        </table:table-row>
      </table:table>
      <text:p text:style-name="P104"><text:span text:style-name="T36"/></text:p>
      <text:p text:style-name="P103"/>
      <text:p text:style-name="P80"/>
      <text:h text:style-name="P112" text:outline-level="2"/>
      <text:h text:style-name="P113" text:outline-level="2"><text:bookmark-start text:name="__RefHeading___Toc1697_1505471852"/>Parte <text:span text:style-name="T60">2: comportamiento por defecto de nmap</text:span>:<text:bookmark-end text:name="__RefHeading___Toc1697_1505471852"/></text:h>
      <text:list text:style-name="L10">
        <text:list-item>
          <text:p text:style-name="P133">Estados y respuesta TCP:</text:p>
        </text:list-item>
      </text:list>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Table_20_Heading">Estado del puerto</text:p>
            </table:table-cell>
            <table:table-cell table:style-name="Tabla1.A1" office:value-type="string">
              <text:p text:style-name="Table_20_Heading">Respuesta observada</text:p>
            </table:table-cell>
            <table:table-cell table:style-name="Tabla1.A1" office:value-type="string">
              <text:p text:style-name="Table_20_Heading">Significado</text:p>
            </table:table-cell>
          </table:table-row>
        </table:table-header-rows>
        <table:table-row>
          <table:table-cell table:style-name="Tabla1.A1" office:value-type="string">
            <text:p text:style-name="P98">Abierto (Open)</text:p>
          </table:table-cell>
          <table:table-cell table:style-name="Tabla1.A1" office:value-type="string">
            <text:p text:style-name="P98">SYN → SYN-ACK</text:p>
          </table:table-cell>
          <table:table-cell table:style-name="Tabla1.A1" office:value-type="string">
            <text:p text:style-name="P98">Existe un servicio escuchando en ese puerto</text:p>
          </table:table-cell>
        </table:table-row>
        <table:table-row>
          <table:table-cell table:style-name="Tabla1.A1" office:value-type="string">
            <text:p text:style-name="P98">Cerrado (Closed)</text:p>
          </table:table-cell>
          <table:table-cell table:style-name="Tabla1.A1" office:value-type="string">
            <text:p text:style-name="P98">SYN → RST-ACK</text:p>
          </table:table-cell>
          <table:table-cell table:style-name="Tabla1.A1" office:value-type="string">
            <text:p text:style-name="P98">El host responde, pero no hay servicio activo</text:p>
          </table:table-cell>
        </table:table-row>
        <table:table-row>
          <table:table-cell table:style-name="Tabla1.A1" office:value-type="string">
            <text:p text:style-name="P98">Filtrado (Filtered)</text:p>
          </table:table-cell>
          <table:table-cell table:style-name="Tabla1.A1" office:value-type="string">
            <text:p text:style-name="P98">Sin respuesta / ICMP unreachable</text:p>
          </table:table-cell>
          <table:table-cell table:style-name="Tabla1.A1" office:value-type="string">
            <text:p text:style-name="P98">Firewall o filtro bloquea el acceso</text:p>
          </table:table-cell>
        </table:table-row>
      </table:table>
      <text:p text:style-name="P99"><text:span text:style-name="T36"/></text:p>
      <text:list text:continue-numbering="true" text:style-name="L10">
        <text:list-item>
          <text:p text:style-name="P133">Comportamiento por defecto de nmap:</text:p>
        </text:list-item>
      </text:list>
      <table:table table:name="Tabla2" table:style-name="Tabla2">
        <table:table-column table:style-name="Tabla2.A"/>
        <table:table-column table:style-name="Tabla2.B"/>
        <table:table-header-rows>
          <table:table-row>
            <table:table-cell table:style-name="Tabla2.A1" office:value-type="string">
              <text:p text:style-name="Table_20_Heading">Característica</text:p>
            </table:table-cell>
            <table:table-cell table:style-name="Tabla2.A1" office:value-type="string">
              <text:p text:style-name="Table_20_Heading">Resultado</text:p>
            </table:table-cell>
          </table:table-row>
        </table:table-header-rows>
        <table:table-row>
          <table:table-cell table:style-name="Tabla2.A1" office:value-type="string">
            <text:p text:style-name="Table_20_Contents">Herramienta utilizada</text:p>
          </table:table-cell>
          <table:table-cell table:style-name="Tabla2.A1" office:value-type="string">
            <text:p text:style-name="Table_20_Contents">Nmap 7.99</text:p>
          </table:table-cell>
        </table:table-row>
        <table:table-row>
          <table:table-cell table:style-name="Tabla2.A1" office:value-type="string">
            <text:p text:style-name="Table_20_Contents">Escaneo por defecto</text:p>
          </table:table-cell>
          <table:table-cell table:style-name="Tabla2.A1" office:value-type="string">
            <text:p text:style-name="Table_20_Contents">TCP SYN Scan (si se ejecuta con privilegios)</text:p>
          </table:table-cell>
        </table:table-row>
        <table:table-row>
          <table:table-cell table:style-name="Tabla2.A1" office:value-type="string">
            <text:p text:style-name="Table_20_Contents">Número de puertos escaneados por defecto</text:p>
          </table:table-cell>
          <table:table-cell table:style-name="Tabla2.A1" office:value-type="string">
            <text:p text:style-name="Table_20_Contents">1000 puertos más comunes</text:p>
          </table:table-cell>
        </table:table-row>
        <table:table-row>
          <table:table-cell table:style-name="Tabla2.A1" office:value-type="string">
            <text:p text:style-name="Table_20_Contents">Resolución DNS</text:p>
          </table:table-cell>
          <table:table-cell table:style-name="Tabla2.A1" office:value-type="string">
            <text:p text:style-name="Table_20_Contents">Sí, salvo que se use <text:span text:style-name="Source_20_Text">-n</text:span></text:p>
          </table:table-cell>
        </table:table-row>
        <table:table-row>
          <table:table-cell table:style-name="Tabla2.A1" office:value-type="string">
            <text:p text:style-name="Table_20_Contents">Descubrimiento de host</text:p>
          </table:table-cell>
          <table:table-cell table:style-name="Tabla2.A1" office:value-type="string">
            <text:p text:style-name="Table_20_Contents">Sí, salvo que se use <text:span text:style-name="Source_20_Text">-Pn</text:span></text:p>
          </table:table-cell>
        </table:table-row>
        <table:table-row>
          <table:table-cell table:style-name="Tabla2.A1" office:value-type="string">
            <text:p text:style-name="Table_20_Contents">Parámetro usado en práctica</text:p>
          </table:table-cell>
          <table:table-cell table:style-name="Tabla2.A1" office:value-type="string">
            <text:p text:style-name="Table_20_Contents"><text:span text:style-name="Source_20_Text">-Pn</text:span></text:p>
          </table:table-cell>
        </table:table-row>
      </table:table>
      <text:p text:style-name="P99"><text:span text:style-name="T36"/></text:p>
      <text:list text:continue-numbering="true" text:style-name="L10">
        <text:list-item>
          <text:p text:style-name="P133">Resultado de nmap localhost:</text:p>
        </text:list-item>
      </text:list>
      <text:p text:style-name="P100"><text:span text:style-name="T36"/></text:p>
      <table:table table:name="Tabla3" table:style-name="Tabla3">
        <table:table-column table:style-name="Tabla3.A"/>
        <table:table-column table:style-name="Tabla3.B"/>
        <table:table-column table:style-name="Tabla3.C"/>
        <table:table-column table:style-name="Tabla3.D"/>
        <table:table-header-rows>
          <table:table-row>
            <table:table-cell table:style-name="Tabla3.A1" office:value-type="string">
              <text:p text:style-name="Table_20_Heading">IP escaneada</text:p>
            </table:table-cell>
            <table:table-cell table:style-name="Tabla3.A1" office:value-type="string">
              <text:p text:style-name="Table_20_Heading">Host activo</text:p>
            </table:table-cell>
            <table:table-cell table:style-name="Tabla3.A1" office:value-type="string">
              <text:p text:style-name="Table_20_Heading">Puertos escaneados</text:p>
            </table:table-cell>
            <table:table-cell table:style-name="Tabla3.A1" office:value-type="string">
              <text:p text:style-name="Table_20_Heading">Resultado</text:p>
            </table:table-cell>
          </table:table-row>
        </table:table-header-rows>
        <table:table-row>
          <table:table-cell table:style-name="Tabla3.A1" office:value-type="string">
            <text:p text:style-name="Table_20_Contents">127.0.0.1</text:p>
          </table:table-cell>
          <table:table-cell table:style-name="Tabla3.A1" office:value-type="string">
            <text:p text:style-name="Table_20_Contents">Sí</text:p>
          </table:table-cell>
          <table:table-cell table:style-name="Tabla3.A1" office:value-type="string">
            <text:p text:style-name="Table_20_Contents">1000</text:p>
          </table:table-cell>
          <table:table-cell table:style-name="Tabla3.A1" office:value-type="string">
            <text:p text:style-name="Table_20_Contents">Todos cerrados (antes de iniciar Docker Compose)</text:p>
          </table:table-cell>
        </table:table-row>
      </table:table>
      <text:p text:style-name="P99"><text:span text:style-name="T36"/></text:p>
      <text:list text:continue-numbering="true" text:style-name="L10">
        <text:list-item>
          <text:p text:style-name="P133">Servicios expuestos con docker compose:</text:p>
        </text:list-item>
      </text:list>
      <table:table table:name="Tabla4" table:style-name="Tabla4">
        <table:table-column table:style-name="Tabla4.A"/>
        <table:table-column table:style-name="Tabla4.B"/>
        <table:table-column table:style-name="Tabla4.C"/>
        <table:table-column table:style-name="Tabla4.D"/>
        <table:table-header-rows>
          <table:table-row>
            <table:table-cell table:style-name="Tabla4.A1" office:value-type="string">
              <text:p text:style-name="Table_20_Heading">Contenedor</text:p>
            </table:table-cell>
            <table:table-cell table:style-name="Tabla4.A1" office:value-type="string">
              <text:p text:style-name="Table_20_Heading">Servicio</text:p>
            </table:table-cell>
            <table:table-cell table:style-name="Tabla4.A1" office:value-type="string">
              <text:p text:style-name="Table_20_Heading">Puerto interno</text:p>
            </table:table-cell>
            <table:table-cell table:style-name="Tabla4.A1" office:value-type="string">
              <text:p text:style-name="Table_20_Heading">Puerto publicado en host</text:p>
            </table:table-cell>
          </table:table-row>
        </table:table-header-rows>
        <table:table-row>
          <table:table-cell table:style-name="Tabla4.A1" office:value-type="string">
            <text:p text:style-name="Table_20_Contents">lab_ftp</text:p>
          </table:table-cell>
          <table:table-cell table:style-name="Tabla4.A1" office:value-type="string">
            <text:p text:style-name="Table_20_Contents">FTP</text:p>
          </table:table-cell>
          <table:table-cell table:style-name="Tabla4.A1" office:value-type="string">
            <text:p text:style-name="Table_20_Contents">21</text:p>
          </table:table-cell>
          <table:table-cell table:style-name="Tabla4.A1" office:value-type="string">
            <text:p text:style-name="Table_20_Contents">21</text:p>
          </table:table-cell>
        </table:table-row>
        <table:table-row>
          <table:table-cell table:style-name="Tabla4.A1" office:value-type="string">
            <text:p text:style-name="Table_20_Contents">lab_ssh</text:p>
          </table:table-cell>
          <table:table-cell table:style-name="Tabla4.A1" office:value-type="string">
            <text:p text:style-name="Table_20_Contents">SSH</text:p>
          </table:table-cell>
          <table:table-cell table:style-name="Tabla4.A1" office:value-type="string">
            <text:p text:style-name="Table_20_Contents">22</text:p>
          </table:table-cell>
          <table:table-cell table:style-name="Tabla4.A1" office:value-type="string">
            <text:p text:style-name="Table_20_Contents">2222</text:p>
          </table:table-cell>
        </table:table-row>
        <table:table-row>
          <table:table-cell table:style-name="Tabla4.A1" office:value-type="string">
            <text:p text:style-name="Table_20_Contents">lab_http</text:p>
          </table:table-cell>
          <table:table-cell table:style-name="Tabla4.A1" office:value-type="string">
            <text:p text:style-name="Table_20_Contents">HTTP (Nginx)</text:p>
          </table:table-cell>
          <table:table-cell table:style-name="Tabla4.A1" office:value-type="string">
            <text:p text:style-name="Table_20_Contents">80</text:p>
          </table:table-cell>
          <table:table-cell table:style-name="Tabla4.A1" office:value-type="string">
            <text:p text:style-name="Table_20_Contents">8080</text:p>
          </table:table-cell>
        </table:table-row>
      </table:table>
      <text:p text:style-name="P99"><text:span text:style-name="T36"/></text:p>
      <text:list text:continue-numbering="true" text:style-name="L10">
        <text:list-item>
          <text:p text:style-name="P133">Resultado del escaneo final (nmap -Pn -p 21,23,2222,8080 localhost):</text:p>
        </text:list-item>
      </text:list>
      <table:table table:name="Tabla5" table:style-name="Tabla5">
        <table:table-column table:style-name="Tabla5.A"/>
        <table:table-column table:style-name="Tabla5.B"/>
        <table:table-column table:style-name="Tabla5.C"/>
        <table:table-column table:style-name="Tabla5.D"/>
        <table:table-header-rows>
          <table:table-row>
            <table:table-cell table:style-name="Tabla5.A1" office:value-type="string">
              <text:p text:style-name="Table_20_Heading">Puerto</text:p>
            </table:table-cell>
            <table:table-cell table:style-name="Tabla5.A1" office:value-type="string">
              <text:p text:style-name="Table_20_Heading">Estado</text:p>
            </table:table-cell>
            <table:table-cell table:style-name="Tabla5.A1" office:value-type="string">
              <text:p text:style-name="Table_20_Heading">Servicio detectado por Nmap</text:p>
            </table:table-cell>
            <table:table-cell table:style-name="Tabla5.A1" office:value-type="string">
              <text:p text:style-name="Table_20_Heading">Interpretación</text:p>
            </table:table-cell>
          </table:table-row>
        </table:table-header-rows>
        <table:table-row>
          <table:table-cell table:style-name="Tabla5.A1" office:value-type="string">
            <text:p text:style-name="Table_20_Contents">21</text:p>
          </table:table-cell>
          <table:table-cell table:style-name="Tabla5.A1" office:value-type="string">
            <text:p text:style-name="Table_20_Contents">Open</text:p>
          </table:table-cell>
          <table:table-cell table:style-name="Tabla5.A1" office:value-type="string">
            <text:p text:style-name="Table_20_Contents">ftp</text:p>
          </table:table-cell>
          <table:table-cell table:style-name="Tabla5.A1" office:value-type="string">
            <text:p text:style-name="Table_20_Contents">Servicio FTP activo</text:p>
          </table:table-cell>
        </table:table-row>
        <table:table-row>
          <table:table-cell table:style-name="Tabla5.A1" office:value-type="string">
            <text:p text:style-name="Table_20_Contents">23</text:p>
          </table:table-cell>
          <table:table-cell table:style-name="Tabla5.A1" office:value-type="string">
            <text:p text:style-name="Table_20_Contents">Closed</text:p>
          </table:table-cell>
          <table:table-cell table:style-name="Tabla5.A1" office:value-type="string">
            <text:p text:style-name="Table_20_Contents">telnet</text:p>
          </table:table-cell>
          <table:table-cell table:style-name="Tabla5.A1" office:value-type="string">
            <text:p text:style-name="Table_20_Contents">No existe servicio escuchando</text:p>
          </table:table-cell>
        </table:table-row>
        <table:table-row>
          <table:table-cell table:style-name="Tabla5.A1" office:value-type="string">
            <text:p text:style-name="Table_20_Contents">2222</text:p>
          </table:table-cell>
          <table:table-cell table:style-name="Tabla5.A1" office:value-type="string">
            <text:p text:style-name="Table_20_Contents">Open</text:p>
          </table:table-cell>
          <table:table-cell table:style-name="Tabla5.A1" office:value-type="string">
            <text:p text:style-name="Table_20_Contents">EtherNetIP-1*</text:p>
          </table:table-cell>
          <table:table-cell table:style-name="Tabla5.A1" office:value-type="string">
            <text:p text:style-name="Table_20_Contents">Puerto redirigido al SSH del contenedor</text:p>
          </table:table-cell>
        </table:table-row>
        <table:table-row>
          <table:table-cell table:style-name="Tabla5.A1" office:value-type="string">
            <text:p text:style-name="Table_20_Contents">8080</text:p>
          </table:table-cell>
          <table:table-cell table:style-name="Tabla5.A1" office:value-type="string">
            <text:p text:style-name="Table_20_Contents">Open</text:p>
          </table:table-cell>
          <table:table-cell table:style-name="Tabla5.A1" office:value-type="string">
            <text:p text:style-name="Table_20_Contents">http-proxy*</text:p>
          </table:table-cell>
          <table:table-cell table:style-name="Tabla5.A1" office:value-type="string">
            <text:p text:style-name="Table_20_Contents">Puerto redirigido al servidor web</text:p>
          </table:table-cell>
        </table:table-row>
      </table:table>
      <text:p text:style-name="P99"><text:span text:style-name="T36"/></text:p>
      <text:p text:style-name="P134">Nmap muestra el nombre asociado por su base de datos estándar, aunque realmente pertenece a servicios de docker que están personalizados.</text:p>
      <text:p text:style-name="P101"><text:span text:style-name="T36"/></text:p>
      <text:list text:continue-numbering="true" text:style-name="L10">
        <text:list-item>
          <text:p text:style-name="P133">Evidencias en Wireshark:</text:p>
        </text:list-item>
      </text:list>
      <text:p text:style-name="P99"><text:span text:style-name="T36"/></text:p>
      <table:table table:name="Tabla6" table:style-name="Tabla6">
        <table:table-column table:style-name="Tabla6.A"/>
        <table:table-column table:style-name="Tabla6.B"/>
        <table:table-column table:style-name="Tabla6.C"/>
        <table:table-header-rows>
          <table:table-row>
            <table:table-cell table:style-name="Tabla6.A1" office:value-type="string">
              <text:p text:style-name="Table_20_Heading">Puerto</text:p>
            </table:table-cell>
            <table:table-cell table:style-name="Tabla6.A1" office:value-type="string">
              <text:p text:style-name="Table_20_Heading">Secuencia observada</text:p>
            </table:table-cell>
            <table:table-cell table:style-name="Tabla6.A1" office:value-type="string">
              <text:p text:style-name="Table_20_Heading">Estado deducido</text:p>
            </table:table-cell>
          </table:table-row>
        </table:table-header-rows>
        <table:table-row>
          <table:table-cell table:style-name="Tabla6.A1" office:value-type="string">
            <text:p text:style-name="Table_20_Contents">21</text:p>
          </table:table-cell>
          <table:table-cell table:style-name="Tabla6.A1" office:value-type="string">
            <text:p text:style-name="Table_20_Contents">SYN → SYN-ACK → RST</text:p>
          </table:table-cell>
          <table:table-cell table:style-name="Tabla6.A1" office:value-type="string">
            <text:p text:style-name="Table_20_Contents">Abierto</text:p>
          </table:table-cell>
        </table:table-row>
        <table:table-row>
          <table:table-cell table:style-name="Tabla6.A1" office:value-type="string">
            <text:p text:style-name="Table_20_Contents">23</text:p>
          </table:table-cell>
          <table:table-cell table:style-name="Tabla6.A1" office:value-type="string">
            <text:p text:style-name="Table_20_Contents">SYN → RST-ACK</text:p>
          </table:table-cell>
          <table:table-cell table:style-name="Tabla6.A1" office:value-type="string">
            <text:p text:style-name="Table_20_Contents">Cerrado</text:p>
          </table:table-cell>
        </table:table-row>
        <table:table-row>
          <table:table-cell table:style-name="Tabla6.A1" office:value-type="string">
            <text:p text:style-name="Table_20_Contents">2222</text:p>
          </table:table-cell>
          <table:table-cell table:style-name="Tabla6.A1" office:value-type="string">
            <text:p text:style-name="Table_20_Contents">SYN → SYN-ACK → RST</text:p>
          </table:table-cell>
          <table:table-cell table:style-name="Tabla6.A1" office:value-type="string">
            <text:p text:style-name="Table_20_Contents">Abierto</text:p>
          </table:table-cell>
        </table:table-row>
        <table:table-row>
          <table:table-cell table:style-name="Tabla6.A1" office:value-type="string">
            <text:p text:style-name="Table_20_Contents">8080</text:p>
          </table:table-cell>
          <table:table-cell table:style-name="Tabla6.A1" office:value-type="string">
            <text:p text:style-name="Table_20_Contents">SYN → SYN-ACK → RST</text:p>
          </table:table-cell>
          <table:table-cell table:style-name="Tabla6.A1" office:value-type="string">
            <text:p text:style-name="Table_20_Contents">Abierto</text:p>
          </table:table-cell>
        </table:table-row>
      </table:table>
      <text:p text:style-name="P99"><text:span text:style-name="T36"/></text:p>
      <text:p text:style-name="P99"/>
      <text:h text:style-name="P3" text:outline-level="1"><text:bookmark-start text:name="__RefHeading___Toc1996_2704774588 Copia 1 Copia 2 Copia 1 Copia 1"/><text:span text:style-name="T20">5. Conclusiones</text:span><text:span text:style-name="T18">:</text:span><text:bookmark-end text:name="__RefHeading___Toc1996_2704774588 Copia 1 Copia 2 Copia 1 Copia 1"/></text:h>
      <text:p text:style-name="P8"/>
      <text:p text:style-name="P9">Gracias a esta práctica me permitió ver y comprender de forma práctica como funciona el descubrimiento de hosts en una red y la diferencia real de trabajar en redes locales y redes externas.</text:p>
      <text:p text:style-name="P9">Muchos conceptos no estaban asimilados, solo estaba visto de forma teórica y esto permite visualizarlo de una forma más real.</text:p>
      <text:p text:style-name="P9">Dándome una muestra de que no existe solo un método válido para detectar equipos activos, sino que depende del entorno en el que me encuentre, haciendo que en redes locales sea más rápido mediante ARP.</text:p>
      <text:p text:style-name="P9">Y en la segunda parte me ayudó a comprobar como funcionaba realmente nmap haciéndome ver lo importante que es la administración de las redes y las auditorías de la seguridad. Es cierto que la herramienta ya era conocida, pero de una forma básica, lo que me ayudó a entrar en profundidad en ella.</text:p>
      <text:h text:style-name="P3" text:outline-level="1"><text:bookmark-start text:name="__RefHeading___Toc1996_2704774588 Copia 1 Copia 2 Copia 1 Copia 2"/><text:span text:style-name="T20">6. Bibliografía</text:span><text:span text:style-name="T18">:</text:span><text:bookmark-end text:name="__RefHeading___Toc1996_2704774588 Copia 1 Copia 2 Copia 1 Copia 2"/></text:h>
      <text:p text:style-name="P148"><text:span text:style-name="T23">1. Ivanov, I., &amp; Ivanov, I. (n.d.). </text:span><text:span text:style-name="T24">TCP and UDP essentials</text:span><text:span text:style-name="T23">. NetworkAcademy.IO. </text:span><text:a xlink:type="simple" xlink:href="https://www.networkacademy.io/ccna/network-security/tcp-and-udp-essentials" text:style-name="Internet_20_link" text:visited-style-name="Visited_20_Internet_20_Link"><text:span text:style-name="T23">https://www.networkacademy.io/ccna/network-security/tcp-and-udp-essentials</text:span></text:a></text:p>
      <text:p text:style-name="P46"><text:span text:style-name="T23">2</text:span><text:span text:style-name="T22">. </text:span>Peiro, E. (2026, April 23). Modelo OSI y TCP/IP: Las 7 Capas Explicadas para Principiantes [2026]. <text:span text:style-name="T51">Aprender21</text:span>. <text:a xlink:type="simple" xlink:href="https://www.aprender21.com/blog/modelo-osi-tcp-ip-guia" text:style-name="Internet_20_link" text:visited-style-name="Visited_20_Internet_20_Link">https://www.aprender21.com/blog/modelo-osi-tcp-ip-guia</text:a></text:p>
      <text:p text:style-name="P40"><text:span text:style-name="T23">3</text:span><text:span text:style-name="T21">. Docker compose: </text:span>Inc, D. (2026, January 7). <text:span text:style-name="T51">Docker compose</text:span>. Docker Documentation. <text:a xlink:type="simple" xlink:href="https://docs.docker.com/compose/" text:style-name="Internet_20_link" text:visited-style-name="Visited_20_Internet_20_Link">https://docs.docker.com/compose/</text:a></text:p>
      <text:p text:style-name="P40"/>
      <text:p text:style-name="P7"/>
      <text:p text:style-name="P5"><text:span text:style-name="T1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roman"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styles>
    <draw:fill-image draw:name="msFillBitmap_20_1" draw:display-name="msFillBitmap 1" xlink:href="Pictures/1000000000000200000002006D79B285.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1.27cm" fo:margin-top="0cm" fo:margin-bottom="0.282cm" style:contextual-spacing="true"/>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Default" style:family="paragraph">
      <style:paragraph-properties fo:text-align="start" style:justify-single-word="false"/>
      <style:text-properties fo:color="#000000" loext:opacity="100%" style:font-name="Times New Roman" fo:font-family="'Times New Roman'" style:font-family-generic="roman" style:font-pitch="variable" fo:font-size="12pt" style:font-size-asian="12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itulo_20_3" style:display-name="Titulo 3" style:family="paragraph" style:parent-style-name="Default">
      <style:paragraph-properties fo:text-align="justify" style:justify-single-word="false"/>
      <style:text-properties fo:font-size="14pt" fo:font-weight="bold" officeooo:rsid="016fdca6" style:font-size-asian="14pt" style:font-weight-asian="bold" style:font-size-complex="14pt" style:font-weight-complex="bold"/>
    </style:style>
    <style:style style:name="Estilo_20_de_20_dibujo_20_predeterminado" style:display-name="Estilo de dibujo predeterminado" style:family="paragraph">
      <style:paragraph-properties fo:margin-top="0cm" fo:margin-bottom="0cm" style:contextual-spacing="false" style:line-height-at-least="0.353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o_20_sin_20_relleno" style:display-name="Objeto sin relleno" style:family="paragraph" style:parent-style-name="Estilo_20_de_20_dibujo_20_predeterminado">
      <style:paragraph-properties fo:margin-top="0cm" fo:margin-bottom="0cm" style:contextual-spacing="false" style:line-height-at-least="0.353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Estilo_20_de_20_dibujo_20_predeterminado">
      <style:paragraph-properties fo:margin-top="0cm" fo:margin-bottom="0cm" style:contextual-spacing="false" style:line-height-at-least="0.353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general_20_A4" style:display-name="Título general A4" style:family="paragraph" style:parent-style-name="A4">
      <style:text-properties style:font-name="Noto Sans" fo:font-family="'Noto Sans'" style:font-family-generic="roman" style:font-pitch="variable" fo:font-size="43.5pt" style:font-size-asian="43.5pt"/>
    </style:style>
    <style:style style:name="Título_20_A4" style:display-name="Título A4" style:family="paragraph" style:parent-style-name="A4">
      <style:text-properties style:font-name="Noto Sans" fo:font-family="'Noto Sans'" style:font-family-generic="roman" style:font-pitch="variable" fo:font-size="24pt" style:font-size-asian="24pt"/>
    </style:style>
    <style:style style:name="Texto_20_A4" style:display-name="Texto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ítulo_20_general_20_A0" style:display-name="Título general A0" style:family="paragraph" style:parent-style-name="A0">
      <style:text-properties style:font-name="Noto Sans" fo:font-family="'Noto Sans'" style:font-family-generic="roman" style:font-pitch="variable" fo:font-size="95.5pt" style:font-size-asian="95.5pt"/>
    </style:style>
    <style:style style:name="Título_20_A0" style:display-name="Título A0" style:family="paragraph" style:parent-style-name="A0">
      <style:text-properties style:font-name="Noto Sans" fo:font-family="'Noto Sans'" style:font-family-generic="roman" style:font-pitch="variable" fo:font-size="71.5pt" style:font-size-asian="71.5pt"/>
    </style:style>
    <style:style style:name="Texto_20_A0" style:display-name="Texto A0" style:family="paragraph" style:parent-style-name="A0">
      <style:text-properties style:font-name="Noto Sans" fo:font-family="'Noto Sans'" style:font-family-generic="roman" style:font-pitch="variable" fo:font-size="47.5pt" style:font-size-asian="47.5pt"/>
    </style:style>
    <style:style style:name="Imagen"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as" style:family="paragraph" style:parent-style-name="Imagen">
      <style:text-properties style:font-name="Liberation Sans" fo:font-family="'Liberation Sans'" style:font-family-generic="roman" style:font-pitch="variable" fo:font-size="14pt" fo:font-weight="bold" style:font-size-asian="14pt" style:font-weight-asian="bold"/>
    </style:style>
    <style:style style:name="Rellenado" style:family="paragraph" style:parent-style-name="Formas">
      <style:text-properties style:font-name="Liberation Sans" fo:font-family="'Liberation Sans'" style:font-family-generic="roman" style:font-pitch="variable" fo:font-size="14pt" fo:font-weight="bold" style:font-size-asian="14pt" style:font-weight-asian="bold"/>
    </style:style>
    <style:style style:name="Rellenado_20_azul" style:display-name="Rellenado azul" style:family="paragraph" style:parent-style-name="Rellenado">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verde" style:display-name="Rellenado verde" style:family="paragraph" style:parent-style-name="Rellenado">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rojo" style:display-name="Rellenado rojo" style:family="paragraph" style:parent-style-name="Rellenado">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amarillo" style:display-name="Rellenado amarillo" style:family="paragraph" style:parent-style-name="Rellenado">
      <style:text-properties fo:color="#ffffff" loext:opacity="100%" style:font-name="Liberation Sans" fo:font-family="'Liberation Sans'" style:font-family-generic="roman" style:font-pitch="variable" fo:font-size="14pt" fo:font-weight="bold" style:font-size-asian="14pt" style:font-weight-asian="bold"/>
    </style:style>
    <style:style style:name="Contorneado" style:family="paragraph" style:parent-style-name="Formas">
      <style:text-properties style:font-name="Liberation Sans" fo:font-family="'Liberation Sans'" style:font-family-generic="roman" style:font-pitch="variable" fo:font-size="14pt" fo:font-weight="bold" style:font-size-asian="14pt" style:font-weight-asian="bold"/>
    </style:style>
    <style:style style:name="Contorneado_20_azul" style:display-name="Contorneado azul" style:family="paragraph" style:parent-style-name="Contorneado">
      <style:text-properties fo:color="#355269" loext:opacity="100%" style:font-name="Liberation Sans" fo:font-family="'Liberation Sans'" style:font-family-generic="roman" style:font-pitch="variable" fo:font-size="14pt" fo:font-weight="bold" style:font-size-asian="14pt" style:font-weight-asian="bold"/>
    </style:style>
    <style:style style:name="Contorneado_20_verde" style:display-name="Contorneado verde" style:family="paragraph" style:parent-style-name="Contorneado">
      <style:text-properties fo:color="#127622" loext:opacity="100%" style:font-name="Liberation Sans" fo:font-family="'Liberation Sans'" style:font-family-generic="roman" style:font-pitch="variable" fo:font-size="14pt" fo:font-weight="bold" style:font-size-asian="14pt" style:font-weight-asian="bold"/>
    </style:style>
    <style:style style:name="Contorneado_20_rojo" style:display-name="Contorneado rojo" style:family="paragraph" style:parent-style-name="Contorneado">
      <style:text-properties fo:color="#c9211e" loext:opacity="100%" style:font-name="Liberation Sans" fo:font-family="'Liberation Sans'" style:font-family-generic="roman" style:font-pitch="variable" fo:font-size="14pt" fo:font-weight="bold" style:font-size-asian="14pt" style:font-weight-asian="bold"/>
    </style:style>
    <style:style style:name="Contorneado_20_amarillo" style:display-name="Contorneado amarillo" style:family="paragraph" style:parent-style-name="Contorneado">
      <style:text-properties fo:color="#b47804" loext:opacity="100%" style:font-name="Liberation Sans" fo:font-family="'Liberation Sans'" style:font-family-generic="roman" style:font-pitch="variable" fo:font-size="14pt" fo:font-weight="bold" style:font-size-asian="14pt" style:font-weight-asian="bold"/>
    </style:style>
    <style:style style:name="Líneas" style:family="paragraph" style:parent-style-name="Imagen">
      <style:text-properties style:font-name="Liberation Sans" fo:font-family="'Liberation Sans'" style:font-family-generic="roman" style:font-pitch="variable" fo:font-size="18pt" style:font-size-asian="18pt"/>
    </style:style>
    <style:style style:name="Línea_20_con_20_flecha" style:display-name="Línea con flecha" style:family="paragraph" style:parent-style-name="Líneas">
      <style:text-properties style:font-name="Liberation Sans" fo:font-family="'Liberation Sans'" style:font-family-generic="roman" style:font-pitch="variable" fo:font-size="18pt" style:font-size-asian="18pt"/>
    </style:style>
    <style:style style:name="Línea_20_discontinua" style:display-name="Línea discontinua" style:family="paragraph" style:parent-style-name="Líneas">
      <style:text-properties style:font-name="Liberation Sans" fo:font-family="'Liberation Sans'" style:font-family-generic="roman" style:font-pitch="variable" fo:font-size="18pt" style:font-size-asian="18pt"/>
    </style:style>
    <style:style style:name="TITLE_7e_LT_7e_Gliederung_20_1" style:display-name="TITLE~LT~Gliederung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Gliederung_20_2" style:display-name="TITLE~LT~Gliederung 2" style:family="paragraph" style:parent-style-name="TITLE_7e_LT_7e_Gliederung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7e_LT_7e_Gliederung_20_3" style:display-name="TITLE~LT~Gliederung 3" style:family="paragraph" style:parent-style-name="TITLE_7e_LT_7e_Gliederung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7e_LT_7e_Gliederung_20_4" style:display-name="TITLE~LT~Gliederung 4" style:family="paragraph" style:parent-style-name="TITLE_7e_LT_7e_Gliederung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5" style:display-name="TITLE~LT~Gliederung 5" style:family="paragraph" style:parent-style-name="TITLE_7e_LT_7e_Gliederung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Untertitel" style:display-name="TITLE~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Notizen" style:display-name="TITLE~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Hintergrundobjekte" style:display-name="TITLE~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7e_LT_7e_Hintergrund" style:display-name="TITLE~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bg-none"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gray"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dark-gray"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ack"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ack-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white"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ue-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ue-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ue-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ue-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range-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orange-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teal-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teal-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teal-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teal-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magenta-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magenta-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bjetos_20_de_20_fondo" style:display-name="Objetos de fondo"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ndo"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as"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1" style:display-name="Esquema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1" style:display-name="BLANK~LT~Gliederung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7e_LT_7e_Gliederung_20_3" style:display-name="BLANK~LT~Gliederung 3" style:family="paragraph" style:parent-style-name="BLANK_7e_LT_7e_Gliederung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7e_LT_7e_Gliederung_20_4" style:display-name="BLANK~LT~Gliederung 4" style:family="paragraph" style:parent-style-name="BLANK_7e_LT_7e_Gliederung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5" style:display-name="BLANK~LT~Gliederung 5" style:family="paragraph" style:parent-style-name="BLANK_7e_LT_7e_Gliederung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determinado_7e_LT_7e_Gliederung_20_1" style:display-name="Predeterminado~LT~Gliederung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7e_LT_7e_Titel" style:display-name="Predeterminado~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determinado_7e_LT_7e_Hintergrund" style:display-name="Predeterminado~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determinado_20_1_7e_LT_7e_Gliederung_20_1" style:display-name="Predeterminado 1~LT~Gliederung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20_1_7e_LT_7e_Gliederung_20_2" style:display-name="Predeterminado 1~LT~Gliederung 2" style:family="paragraph" style:parent-style-name="Predeterminado_20_1_7e_LT_7e_Gliederung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Predeterminado_20_1_7e_LT_7e_Gliederung_20_3" style:display-name="Predeterminado 1~LT~Gliederung 3" style:family="paragraph" style:parent-style-name="Predeterminado_20_1_7e_LT_7e_Gliederung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Predeterminado_20_1_7e_LT_7e_Gliederung_20_4" style:display-name="Predeterminado 1~LT~Gliederung 4" style:family="paragraph" style:parent-style-name="Predeterminado_20_1_7e_LT_7e_Gliederung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1_7e_LT_7e_Gliederung_20_5" style:display-name="Predeterminado 1~LT~Gliederung 5" style:family="paragraph" style:parent-style-name="Predeterminado_20_1_7e_LT_7e_Gliederung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1_7e_LT_7e_Gliederung_20_6" style:display-name="Predeterminado 1~LT~Gliederung 6" style:family="paragraph" style:parent-style-name="Predeterminado_20_1_7e_LT_7e_Gliederung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1_7e_LT_7e_Gliederung_20_7" style:display-name="Predeterminado 1~LT~Gliederung 7" style:family="paragraph" style:parent-style-name="Predeterminado_20_1_7e_LT_7e_Gliederung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1_7e_LT_7e_Gliederung_20_8" style:display-name="Predeterminado 1~LT~Gliederung 8" style:family="paragraph" style:parent-style-name="Predeterminado_20_1_7e_LT_7e_Gliederung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1_7e_LT_7e_Gliederung_20_9" style:display-name="Predeterminado 1~LT~Gliederung 9" style:family="paragraph" style:parent-style-name="Predeterminado_20_1_7e_LT_7e_Gliederung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1_7e_LT_7e_Titel" style:display-name="Predeterminado 1~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20_1_7e_LT_7e_Untertitel" style:display-name="Predeterminado 1~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20_1_7e_LT_7e_Notizen" style:display-name="Predeterminado 1~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20_1_7e_LT_7e_Hintergrundobjekte" style:display-name="Predeterminado 1~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determinado_20_1_7e_LT_7e_Hintergrund" style:display-name="Predeterminado 1~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determinado_20_2_7e_LT_7e_Gliederung_20_1" style:display-name="Predeterminado 2~LT~Gliederung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20_2_7e_LT_7e_Gliederung_20_2" style:display-name="Predeterminado 2~LT~Gliederung 2" style:family="paragraph" style:parent-style-name="Predeterminado_20_2_7e_LT_7e_Gliederung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Predeterminado_20_2_7e_LT_7e_Gliederung_20_3" style:display-name="Predeterminado 2~LT~Gliederung 3" style:family="paragraph" style:parent-style-name="Predeterminado_20_2_7e_LT_7e_Gliederung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Predeterminado_20_2_7e_LT_7e_Gliederung_20_4" style:display-name="Predeterminado 2~LT~Gliederung 4" style:family="paragraph" style:parent-style-name="Predeterminado_20_2_7e_LT_7e_Gliederung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2_7e_LT_7e_Gliederung_20_5" style:display-name="Predeterminado 2~LT~Gliederung 5" style:family="paragraph" style:parent-style-name="Predeterminado_20_2_7e_LT_7e_Gliederung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2_7e_LT_7e_Gliederung_20_6" style:display-name="Predeterminado 2~LT~Gliederung 6" style:family="paragraph" style:parent-style-name="Predeterminado_20_2_7e_LT_7e_Gliederung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2_7e_LT_7e_Gliederung_20_7" style:display-name="Predeterminado 2~LT~Gliederung 7" style:family="paragraph" style:parent-style-name="Predeterminado_20_2_7e_LT_7e_Gliederung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2_7e_LT_7e_Gliederung_20_8" style:display-name="Predeterminado 2~LT~Gliederung 8" style:family="paragraph" style:parent-style-name="Predeterminado_20_2_7e_LT_7e_Gliederung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2_7e_LT_7e_Gliederung_20_9" style:display-name="Predeterminado 2~LT~Gliederung 9" style:family="paragraph" style:parent-style-name="Predeterminado_20_2_7e_LT_7e_Gliederung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2_7e_LT_7e_Titel" style:display-name="Predeterminado 2~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20_2_7e_LT_7e_Untertitel" style:display-name="Predeterminado 2~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20_2_7e_LT_7e_Notizen" style:display-name="Predeterminado 2~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20_2_7e_LT_7e_Hintergrundobjekte" style:display-name="Predeterminado 2~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determinado_20_2_7e_LT_7e_Hintergrund" style:display-name="Predeterminado 2~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determinado_20_3_7e_LT_7e_Gliederung_20_1" style:display-name="Predeterminado 3~LT~Gliederung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20_3_7e_LT_7e_Gliederung_20_2" style:display-name="Predeterminado 3~LT~Gliederung 2" style:family="paragraph" style:parent-style-name="Predeterminado_20_3_7e_LT_7e_Gliederung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Predeterminado_20_3_7e_LT_7e_Gliederung_20_3" style:display-name="Predeterminado 3~LT~Gliederung 3" style:family="paragraph" style:parent-style-name="Predeterminado_20_3_7e_LT_7e_Gliederung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Predeterminado_20_3_7e_LT_7e_Gliederung_20_4" style:display-name="Predeterminado 3~LT~Gliederung 4" style:family="paragraph" style:parent-style-name="Predeterminado_20_3_7e_LT_7e_Gliederung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3_7e_LT_7e_Gliederung_20_5" style:display-name="Predeterminado 3~LT~Gliederung 5" style:family="paragraph" style:parent-style-name="Predeterminado_20_3_7e_LT_7e_Gliederung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3_7e_LT_7e_Gliederung_20_6" style:display-name="Predeterminado 3~LT~Gliederung 6" style:family="paragraph" style:parent-style-name="Predeterminado_20_3_7e_LT_7e_Gliederung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3_7e_LT_7e_Gliederung_20_7" style:display-name="Predeterminado 3~LT~Gliederung 7" style:family="paragraph" style:parent-style-name="Predeterminado_20_3_7e_LT_7e_Gliederung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3_7e_LT_7e_Gliederung_20_8" style:display-name="Predeterminado 3~LT~Gliederung 8" style:family="paragraph" style:parent-style-name="Predeterminado_20_3_7e_LT_7e_Gliederung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3_7e_LT_7e_Gliederung_20_9" style:display-name="Predeterminado 3~LT~Gliederung 9" style:family="paragraph" style:parent-style-name="Predeterminado_20_3_7e_LT_7e_Gliederung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3_7e_LT_7e_Titel" style:display-name="Predeterminado 3~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20_3_7e_LT_7e_Untertitel" style:display-name="Predeterminado 3~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20_3_7e_LT_7e_Notizen" style:display-name="Predeterminado 3~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20_3_7e_LT_7e_Hintergrundobjekte" style:display-name="Predeterminado 3~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determinado_20_3_7e_LT_7e_Hintergrund" style:display-name="Predeterminado 3~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determinado_20_4_7e_LT_7e_Gliederung_20_1" style:display-name="Predeterminado 4~LT~Gliederung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20_4_7e_LT_7e_Gliederung_20_2" style:display-name="Predeterminado 4~LT~Gliederung 2" style:family="paragraph" style:parent-style-name="Predeterminado_20_4_7e_LT_7e_Gliederung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Predeterminado_20_4_7e_LT_7e_Gliederung_20_3" style:display-name="Predeterminado 4~LT~Gliederung 3" style:family="paragraph" style:parent-style-name="Predeterminado_20_4_7e_LT_7e_Gliederung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Predeterminado_20_4_7e_LT_7e_Gliederung_20_4" style:display-name="Predeterminado 4~LT~Gliederung 4" style:family="paragraph" style:parent-style-name="Predeterminado_20_4_7e_LT_7e_Gliederung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4_7e_LT_7e_Gliederung_20_5" style:display-name="Predeterminado 4~LT~Gliederung 5" style:family="paragraph" style:parent-style-name="Predeterminado_20_4_7e_LT_7e_Gliederung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4_7e_LT_7e_Gliederung_20_6" style:display-name="Predeterminado 4~LT~Gliederung 6" style:family="paragraph" style:parent-style-name="Predeterminado_20_4_7e_LT_7e_Gliederung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4_7e_LT_7e_Gliederung_20_7" style:display-name="Predeterminado 4~LT~Gliederung 7" style:family="paragraph" style:parent-style-name="Predeterminado_20_4_7e_LT_7e_Gliederung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4_7e_LT_7e_Gliederung_20_8" style:display-name="Predeterminado 4~LT~Gliederung 8" style:family="paragraph" style:parent-style-name="Predeterminado_20_4_7e_LT_7e_Gliederung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4_7e_LT_7e_Gliederung_20_9" style:display-name="Predeterminado 4~LT~Gliederung 9" style:family="paragraph" style:parent-style-name="Predeterminado_20_4_7e_LT_7e_Gliederung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4_7e_LT_7e_Titel" style:display-name="Predeterminado 4~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20_4_7e_LT_7e_Untertitel" style:display-name="Predeterminado 4~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20_4_7e_LT_7e_Notizen" style:display-name="Predeterminado 4~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20_4_7e_LT_7e_Hintergrundobjekte" style:display-name="Predeterminado 4~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determinado_20_4_7e_LT_7e_Hintergrund" style:display-name="Predeterminado 4~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determinado_20_5_7e_LT_7e_Gliederung_20_1" style:display-name="Predeterminado 5~LT~Gliederung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20_5_7e_LT_7e_Gliederung_20_2" style:display-name="Predeterminado 5~LT~Gliederung 2" style:family="paragraph" style:parent-style-name="Predeterminado_20_5_7e_LT_7e_Gliederung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Predeterminado_20_5_7e_LT_7e_Gliederung_20_3" style:display-name="Predeterminado 5~LT~Gliederung 3" style:family="paragraph" style:parent-style-name="Predeterminado_20_5_7e_LT_7e_Gliederung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Predeterminado_20_5_7e_LT_7e_Gliederung_20_4" style:display-name="Predeterminado 5~LT~Gliederung 4" style:family="paragraph" style:parent-style-name="Predeterminado_20_5_7e_LT_7e_Gliederung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5_7e_LT_7e_Gliederung_20_5" style:display-name="Predeterminado 5~LT~Gliederung 5" style:family="paragraph" style:parent-style-name="Predeterminado_20_5_7e_LT_7e_Gliederung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5_7e_LT_7e_Gliederung_20_6" style:display-name="Predeterminado 5~LT~Gliederung 6" style:family="paragraph" style:parent-style-name="Predeterminado_20_5_7e_LT_7e_Gliederung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5_7e_LT_7e_Gliederung_20_7" style:display-name="Predeterminado 5~LT~Gliederung 7" style:family="paragraph" style:parent-style-name="Predeterminado_20_5_7e_LT_7e_Gliederung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5_7e_LT_7e_Gliederung_20_8" style:display-name="Predeterminado 5~LT~Gliederung 8" style:family="paragraph" style:parent-style-name="Predeterminado_20_5_7e_LT_7e_Gliederung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5_7e_LT_7e_Gliederung_20_9" style:display-name="Predeterminado 5~LT~Gliederung 9" style:family="paragraph" style:parent-style-name="Predeterminado_20_5_7e_LT_7e_Gliederung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5_7e_LT_7e_Titel" style:display-name="Predeterminado 5~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20_5_7e_LT_7e_Untertitel" style:display-name="Predeterminado 5~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20_5_7e_LT_7e_Notizen" style:display-name="Predeterminado 5~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20_5_7e_LT_7e_Hintergrundobjekte" style:display-name="Predeterminado 5~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determinado_20_5_7e_LT_7e_Hintergrund" style:display-name="Predeterminado 5~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determinado_20_6_7e_LT_7e_Gliederung_20_1" style:display-name="Predeterminado 6~LT~Gliederung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20_6_7e_LT_7e_Gliederung_20_2" style:display-name="Predeterminado 6~LT~Gliederung 2" style:family="paragraph" style:parent-style-name="Predeterminado_20_6_7e_LT_7e_Gliederung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Predeterminado_20_6_7e_LT_7e_Gliederung_20_3" style:display-name="Predeterminado 6~LT~Gliederung 3" style:family="paragraph" style:parent-style-name="Predeterminado_20_6_7e_LT_7e_Gliederung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Predeterminado_20_6_7e_LT_7e_Gliederung_20_4" style:display-name="Predeterminado 6~LT~Gliederung 4" style:family="paragraph" style:parent-style-name="Predeterminado_20_6_7e_LT_7e_Gliederung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6_7e_LT_7e_Gliederung_20_5" style:display-name="Predeterminado 6~LT~Gliederung 5" style:family="paragraph" style:parent-style-name="Predeterminado_20_6_7e_LT_7e_Gliederung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6_7e_LT_7e_Gliederung_20_6" style:display-name="Predeterminado 6~LT~Gliederung 6" style:family="paragraph" style:parent-style-name="Predeterminado_20_6_7e_LT_7e_Gliederung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6_7e_LT_7e_Gliederung_20_7" style:display-name="Predeterminado 6~LT~Gliederung 7" style:family="paragraph" style:parent-style-name="Predeterminado_20_6_7e_LT_7e_Gliederung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6_7e_LT_7e_Gliederung_20_8" style:display-name="Predeterminado 6~LT~Gliederung 8" style:family="paragraph" style:parent-style-name="Predeterminado_20_6_7e_LT_7e_Gliederung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6_7e_LT_7e_Gliederung_20_9" style:display-name="Predeterminado 6~LT~Gliederung 9" style:family="paragraph" style:parent-style-name="Predeterminado_20_6_7e_LT_7e_Gliederung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6_7e_LT_7e_Titel" style:display-name="Predeterminado 6~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20_6_7e_LT_7e_Untertitel" style:display-name="Predeterminado 6~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20_6_7e_LT_7e_Notizen" style:display-name="Predeterminado 6~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20_6_7e_LT_7e_Hintergrundobjekte" style:display-name="Predeterminado 6~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determinado_20_6_7e_LT_7e_Hintergrund" style:display-name="Predeterminado 6~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determinado_20_7_7e_LT_7e_Gliederung_20_1" style:display-name="Predeterminado 7~LT~Gliederung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20_7_7e_LT_7e_Gliederung_20_2" style:display-name="Predeterminado 7~LT~Gliederung 2" style:family="paragraph" style:parent-style-name="Predeterminado_20_7_7e_LT_7e_Gliederung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Predeterminado_20_7_7e_LT_7e_Gliederung_20_3" style:display-name="Predeterminado 7~LT~Gliederung 3" style:family="paragraph" style:parent-style-name="Predeterminado_20_7_7e_LT_7e_Gliederung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Predeterminado_20_7_7e_LT_7e_Gliederung_20_4" style:display-name="Predeterminado 7~LT~Gliederung 4" style:family="paragraph" style:parent-style-name="Predeterminado_20_7_7e_LT_7e_Gliederung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7_7e_LT_7e_Gliederung_20_5" style:display-name="Predeterminado 7~LT~Gliederung 5" style:family="paragraph" style:parent-style-name="Predeterminado_20_7_7e_LT_7e_Gliederung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7_7e_LT_7e_Gliederung_20_6" style:display-name="Predeterminado 7~LT~Gliederung 6" style:family="paragraph" style:parent-style-name="Predeterminado_20_7_7e_LT_7e_Gliederung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7_7e_LT_7e_Gliederung_20_7" style:display-name="Predeterminado 7~LT~Gliederung 7" style:family="paragraph" style:parent-style-name="Predeterminado_20_7_7e_LT_7e_Gliederung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7_7e_LT_7e_Gliederung_20_8" style:display-name="Predeterminado 7~LT~Gliederung 8" style:family="paragraph" style:parent-style-name="Predeterminado_20_7_7e_LT_7e_Gliederung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7_7e_LT_7e_Gliederung_20_9" style:display-name="Predeterminado 7~LT~Gliederung 9" style:family="paragraph" style:parent-style-name="Predeterminado_20_7_7e_LT_7e_Gliederung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7_7e_LT_7e_Titel" style:display-name="Predeterminado 7~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20_7_7e_LT_7e_Untertitel" style:display-name="Predeterminado 7~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20_7_7e_LT_7e_Notizen" style:display-name="Predeterminado 7~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20_7_7e_LT_7e_Hintergrundobjekte" style:display-name="Predeterminado 7~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determinado_20_7_7e_LT_7e_Hintergrund" style:display-name="Predeterminado 7~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determinado_20_8_7e_LT_7e_Gliederung_20_1" style:display-name="Predeterminado 8~LT~Gliederung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20_8_7e_LT_7e_Gliederung_20_2" style:display-name="Predeterminado 8~LT~Gliederung 2" style:family="paragraph" style:parent-style-name="Predeterminado_20_8_7e_LT_7e_Gliederung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Predeterminado_20_8_7e_LT_7e_Gliederung_20_3" style:display-name="Predeterminado 8~LT~Gliederung 3" style:family="paragraph" style:parent-style-name="Predeterminado_20_8_7e_LT_7e_Gliederung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Predeterminado_20_8_7e_LT_7e_Gliederung_20_4" style:display-name="Predeterminado 8~LT~Gliederung 4" style:family="paragraph" style:parent-style-name="Predeterminado_20_8_7e_LT_7e_Gliederung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8_7e_LT_7e_Gliederung_20_5" style:display-name="Predeterminado 8~LT~Gliederung 5" style:family="paragraph" style:parent-style-name="Predeterminado_20_8_7e_LT_7e_Gliederung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8_7e_LT_7e_Gliederung_20_6" style:display-name="Predeterminado 8~LT~Gliederung 6" style:family="paragraph" style:parent-style-name="Predeterminado_20_8_7e_LT_7e_Gliederung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8_7e_LT_7e_Gliederung_20_7" style:display-name="Predeterminado 8~LT~Gliederung 7" style:family="paragraph" style:parent-style-name="Predeterminado_20_8_7e_LT_7e_Gliederung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8_7e_LT_7e_Gliederung_20_8" style:display-name="Predeterminado 8~LT~Gliederung 8" style:family="paragraph" style:parent-style-name="Predeterminado_20_8_7e_LT_7e_Gliederung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8_7e_LT_7e_Gliederung_20_9" style:display-name="Predeterminado 8~LT~Gliederung 9" style:family="paragraph" style:parent-style-name="Predeterminado_20_8_7e_LT_7e_Gliederung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8_7e_LT_7e_Titel" style:display-name="Predeterminado 8~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20_8_7e_LT_7e_Untertitel" style:display-name="Predeterminado 8~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20_8_7e_LT_7e_Notizen" style:display-name="Predeterminado 8~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20_8_7e_LT_7e_Hintergrundobjekte" style:display-name="Predeterminado 8~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determinado_20_8_7e_LT_7e_Hintergrund" style:display-name="Predeterminado 8~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determinado_20_9_7e_LT_7e_Gliederung_20_1" style:display-name="Predeterminado 9~LT~Gliederung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20_9_7e_LT_7e_Gliederung_20_2" style:display-name="Predeterminado 9~LT~Gliederung 2" style:family="paragraph" style:parent-style-name="Predeterminado_20_9_7e_LT_7e_Gliederung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Predeterminado_20_9_7e_LT_7e_Gliederung_20_3" style:display-name="Predeterminado 9~LT~Gliederung 3" style:family="paragraph" style:parent-style-name="Predeterminado_20_9_7e_LT_7e_Gliederung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Predeterminado_20_9_7e_LT_7e_Gliederung_20_4" style:display-name="Predeterminado 9~LT~Gliederung 4" style:family="paragraph" style:parent-style-name="Predeterminado_20_9_7e_LT_7e_Gliederung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9_7e_LT_7e_Gliederung_20_5" style:display-name="Predeterminado 9~LT~Gliederung 5" style:family="paragraph" style:parent-style-name="Predeterminado_20_9_7e_LT_7e_Gliederung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9_7e_LT_7e_Gliederung_20_6" style:display-name="Predeterminado 9~LT~Gliederung 6" style:family="paragraph" style:parent-style-name="Predeterminado_20_9_7e_LT_7e_Gliederung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9_7e_LT_7e_Gliederung_20_7" style:display-name="Predeterminado 9~LT~Gliederung 7" style:family="paragraph" style:parent-style-name="Predeterminado_20_9_7e_LT_7e_Gliederung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9_7e_LT_7e_Gliederung_20_8" style:display-name="Predeterminado 9~LT~Gliederung 8" style:family="paragraph" style:parent-style-name="Predeterminado_20_9_7e_LT_7e_Gliederung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9_7e_LT_7e_Gliederung_20_9" style:display-name="Predeterminado 9~LT~Gliederung 9" style:family="paragraph" style:parent-style-name="Predeterminado_20_9_7e_LT_7e_Gliederung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9_7e_LT_7e_Titel" style:display-name="Predeterminado 9~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20_9_7e_LT_7e_Untertitel" style:display-name="Predeterminado 9~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20_9_7e_LT_7e_Notizen" style:display-name="Predeterminado 9~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20_9_7e_LT_7e_Hintergrundobjekte" style:display-name="Predeterminado 9~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determinado_20_9_7e_LT_7e_Hintergrund" style:display-name="Predeterminado 9~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determinado_20_10_7e_LT_7e_Gliederung_20_1" style:display-name="Predeterminado 10~LT~Gliederung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20_10_7e_LT_7e_Gliederung_20_2" style:display-name="Predeterminado 10~LT~Gliederung 2" style:family="paragraph" style:parent-style-name="Predeterminado_20_10_7e_LT_7e_Gliederung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Predeterminado_20_10_7e_LT_7e_Gliederung_20_3" style:display-name="Predeterminado 10~LT~Gliederung 3" style:family="paragraph" style:parent-style-name="Predeterminado_20_10_7e_LT_7e_Gliederung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Predeterminado_20_10_7e_LT_7e_Gliederung_20_4" style:display-name="Predeterminado 10~LT~Gliederung 4" style:family="paragraph" style:parent-style-name="Predeterminado_20_10_7e_LT_7e_Gliederung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10_7e_LT_7e_Gliederung_20_5" style:display-name="Predeterminado 10~LT~Gliederung 5" style:family="paragraph" style:parent-style-name="Predeterminado_20_10_7e_LT_7e_Gliederung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10_7e_LT_7e_Gliederung_20_6" style:display-name="Predeterminado 10~LT~Gliederung 6" style:family="paragraph" style:parent-style-name="Predeterminado_20_10_7e_LT_7e_Gliederung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10_7e_LT_7e_Gliederung_20_7" style:display-name="Predeterminado 10~LT~Gliederung 7" style:family="paragraph" style:parent-style-name="Predeterminado_20_10_7e_LT_7e_Gliederung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10_7e_LT_7e_Gliederung_20_8" style:display-name="Predeterminado 10~LT~Gliederung 8" style:family="paragraph" style:parent-style-name="Predeterminado_20_10_7e_LT_7e_Gliederung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10_7e_LT_7e_Gliederung_20_9" style:display-name="Predeterminado 10~LT~Gliederung 9" style:family="paragraph" style:parent-style-name="Predeterminado_20_10_7e_LT_7e_Gliederung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10_7e_LT_7e_Titel" style:display-name="Predeterminado 10~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20_10_7e_LT_7e_Untertitel" style:display-name="Predeterminado 10~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20_10_7e_LT_7e_Notizen" style:display-name="Predeterminado 10~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20_10_7e_LT_7e_Hintergrundobjekte" style:display-name="Predeterminado 10~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determinado_20_10_7e_LT_7e_Hintergrund" style:display-name="Predeterminado 10~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determinado_20_11_7e_LT_7e_Gliederung_20_1" style:display-name="Predeterminado 11~LT~Gliederung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20_11_7e_LT_7e_Gliederung_20_2" style:display-name="Predeterminado 11~LT~Gliederung 2" style:family="paragraph" style:parent-style-name="Predeterminado_20_11_7e_LT_7e_Gliederung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Predeterminado_20_11_7e_LT_7e_Gliederung_20_3" style:display-name="Predeterminado 11~LT~Gliederung 3" style:family="paragraph" style:parent-style-name="Predeterminado_20_11_7e_LT_7e_Gliederung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Predeterminado_20_11_7e_LT_7e_Gliederung_20_4" style:display-name="Predeterminado 11~LT~Gliederung 4" style:family="paragraph" style:parent-style-name="Predeterminado_20_11_7e_LT_7e_Gliederung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11_7e_LT_7e_Gliederung_20_5" style:display-name="Predeterminado 11~LT~Gliederung 5" style:family="paragraph" style:parent-style-name="Predeterminado_20_11_7e_LT_7e_Gliederung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11_7e_LT_7e_Gliederung_20_6" style:display-name="Predeterminado 11~LT~Gliederung 6" style:family="paragraph" style:parent-style-name="Predeterminado_20_11_7e_LT_7e_Gliederung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11_7e_LT_7e_Gliederung_20_7" style:display-name="Predeterminado 11~LT~Gliederung 7" style:family="paragraph" style:parent-style-name="Predeterminado_20_11_7e_LT_7e_Gliederung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11_7e_LT_7e_Gliederung_20_8" style:display-name="Predeterminado 11~LT~Gliederung 8" style:family="paragraph" style:parent-style-name="Predeterminado_20_11_7e_LT_7e_Gliederung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11_7e_LT_7e_Gliederung_20_9" style:display-name="Predeterminado 11~LT~Gliederung 9" style:family="paragraph" style:parent-style-name="Predeterminado_20_11_7e_LT_7e_Gliederung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11_7e_LT_7e_Titel" style:display-name="Predeterminado 11~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20_11_7e_LT_7e_Untertitel" style:display-name="Predeterminado 11~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20_11_7e_LT_7e_Notizen" style:display-name="Predeterminado 11~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20_11_7e_LT_7e_Hintergrundobjekte" style:display-name="Predeterminado 11~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determinado_20_11_7e_LT_7e_Hintergrund" style:display-name="Predeterminado 11~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omment" style:family="paragraph" style:parent-style-name="Standard" style:class="extra">
      <style:text-properties fo:font-size="10pt" style:font-size-asian="10pt" style:font-size-complex="10pt"/>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37"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38"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39"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text:style-name="ListLabel_20_40"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text:style-name="ListLabel_20_4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number text:level="1" text:style-name="ListLabel_20_42"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2-22T02:09:00</meta:creation-date>
    <dc:date>2026-04-26T10:33:27.965000000</dc:date>
    <meta:editing-duration>P2DT22H14M53S</meta:editing-duration>
    <meta:editing-cycles>474</meta:editing-cycles>
    <meta:generator>LibreOffice/24.2.2.2$Windows_X86_64 LibreOffice_project/d56cc158d8a96260b836f100ef4b4ef25d6f1a01</meta:generator>
    <meta:print-date>2026-02-15T12:18:03.274000000</meta:print-date>
    <meta:printed-by>Archivos PDF</meta:printed-by>
    <meta:document-statistic meta:table-count="9" meta:image-count="21" meta:object-count="0" meta:page-count="28" meta:paragraph-count="364" meta:word-count="3392" meta:character-count="19633" meta:non-whitespace-character-count="16616"/>
  </office:meta>
</office:document-meta>
</file>